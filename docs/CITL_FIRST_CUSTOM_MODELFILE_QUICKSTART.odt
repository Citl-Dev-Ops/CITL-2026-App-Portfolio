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'Helvetica Neue', Arial, sans-serif"/>
    <style:font-face style:name="ui-monospace" svg:font-family="ui-monospace, SFMono-Regular, Menlo, Consolas, monospace"/>
  </office:font-face-decls>
  <office:automatic-styles>
    <style:style style:name="Table1" style:family="table">
      <style:table-properties style:width="6.7118in" fo:margin-left="0.1875in" table:align="left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3.4438in"/>
    </style:style>
    <style:style style:name="Table1.C" style:family="table-column">
      <style:table-column-properties style:column-width="1.684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01in" fo:margin-left="0.0833in" table:align="left"/>
    </style:style>
    <style:style style:name="Table2.A" style:family="table-column">
      <style:table-column-properties style:column-width="1.8563in"/>
    </style:style>
    <style:style style:name="Table2.B" style:family="table-column">
      <style:table-column-properties style:column-width="2.2715in"/>
    </style:style>
    <style:style style:name="Table2.C" style:family="table-column">
      <style:table-column-properties style:column-width="2.792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.0728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.0728in" fo:margin-bottom="0in" style:contextual-spacing="false"/>
    </style:style>
    <style:style style:name="P5" style:family="paragraph" style:parent-style-name="Text_20_body">
      <style:paragraph-properties fo:margin-left="0.1043in" fo:margin-right="0.1043in" fo:margin-top="0.1043in" fo:margin-bottom="0.1043in" style:contextual-spacing="false" fo:text-indent="0in" style:auto-text-indent="fals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6" style:family="paragraph" style:parent-style-name="Heading_20_3">
      <style:paragraph-properties fo:margin-left="0.2083in" fo:margin-right="0.2083in" fo:margin-top="0.1043in" fo:margin-bottom="0.1043in" style:contextual-spacing="false" fo:text-indent="0in" style:auto-text-indent="fals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7" style:family="paragraph" style:parent-style-name="Text_20_body" style:list-style-name="L2">
      <style:paragraph-properties fo:margin-left="0.1043in" fo:margin-right="0.1043in" fo:margin-top="0.1043in" fo:margin-bottom="0.1043in" style:contextual-spacing="false" fo:text-indent="0in" style:auto-text-indent="fals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8" style:family="paragraph" style:parent-style-name="Text_20_body" style:list-style-name="L2">
      <style:paragraph-properties fo:margin-left="0.1043in" fo:margin-right="0.1043in" fo:margin-top="0.1043in" fo:margin-bottom="0.1043in" style:contextual-spacing="false" fo:text-indent="0in" style:auto-text-indent="false"/>
    </style:style>
    <style:style style:name="P9" style:family="paragraph" style:parent-style-name="Text_20_body" style:list-style-name="L3">
      <style:paragraph-properties fo:margin-left="0.1043in" fo:margin-right="0.1043in" fo:margin-top="0.1043in" fo:margin-bottom="0.1043in" style:contextual-spacing="false" fo:text-indent="0in" style:auto-text-indent="fals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10" style:family="paragraph" style:parent-style-name="Preformatted_20_Text">
      <style:paragraph-properties fo:margin-left="0.1874in" fo:margin-right="0.1874in" fo:margin-top="0.1043in" fo:margin-bottom="0.1043in" style:contextual-spacing="false" fo:text-indent="0in" style:auto-text-indent="fals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11" style:family="paragraph" style:parent-style-name="Text_20_body" style:list-style-name="L4">
      <style:paragraph-properties fo:margin-left="0.1043in" fo:margin-right="0.1043in" fo:margin-top="0.1043in" fo:margin-bottom="0.1043in" style:contextual-spacing="false" fo:text-indent="0in" style:auto-text-indent="false"/>
    </style:style>
    <style:style style:name="P12" style:family="paragraph" style:parent-style-name="Text_20_body">
      <style:paragraph-properties fo:margin-left="0.1043in" fo:margin-right="0.1043in" fo:margin-top="0.1043in" fo:margin-bottom="0.1043in" style:contextual-spacing="false" fo:text-indent="0in" style:auto-text-indent="false"/>
    </style:style>
    <style:style style:name="P13" style:family="paragraph" style:parent-style-name="Text_20_body">
      <style:paragraph-properties fo:margin-left="0.1874in" fo:margin-right="0.1874in" fo:margin-top="0.1043in" fo:margin-bottom="0.1043in" style:contextual-spacing="false" fo:text-indent="0in" style:auto-text-indent="false"/>
    </style:style>
    <style:style style:name="P14" style:family="paragraph" style:parent-style-name="Text_20_body" style:list-style-name="L5">
      <style:paragraph-properties fo:margin-left="0.1043in" fo:margin-right="0.1043in" fo:margin-top="0.1043in" fo:margin-bottom="0.1043in" style:contextual-spacing="false" fo:text-indent="0in" style:auto-text-indent="false"/>
    </style:style>
    <style:style style:name="P15" style:family="paragraph" style:parent-style-name="Text_20_body" style:list-style-name="L5">
      <style:paragraph-properties fo:margin-left="0.1043in" fo:margin-right="0.1043in" fo:margin-top="0.1043in" fo:margin-bottom="0.1043in" style:contextual-spacing="false" fo:text-indent="0in" style:auto-text-indent="fals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16" style:family="paragraph" style:parent-style-name="Text_20_body" style:list-style-name="L6">
      <style:paragraph-properties fo:margin-left="0.1043in" fo:margin-right="0.1043in" fo:margin-top="0.1043in" fo:margin-bottom="0.1043in" style:contextual-spacing="false" fo:text-indent="0in" style:auto-text-indent="false"/>
    </style:style>
    <style:style style:name="P17" style:family="paragraph" style:parent-style-name="Text_20_body" style:list-style-name="L6">
      <style:paragraph-properties fo:margin-left="0.1043in" fo:margin-right="0.1043in" fo:margin-top="0.1043in" fo:margin-bottom="0.1043in" style:contextual-spacing="false" fo:text-indent="0in" style:auto-text-indent="fals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18" style:family="paragraph" style:parent-style-name="Text_20_body">
      <style:paragraph-properties fo:margin-left="0.1874in" fo:margin-right="0.1874in" fo:margin-top="0.0835in" fo:margin-bottom="0.0835in" style:contextual-spacing="false" fo:text-indent="0in" style:auto-text-indent="false"/>
      <style:text-properties loext:padding-left="0in" loext:padding-right="0in" loext:padding-top="0in" loext:padding-bottom="0.0835in" loext:border-left="none" loext:border-right="none" loext:border-top="none" loext:border-bottom="0.06pt dashed #000000"/>
    </style:style>
    <style:style style:name="P19" style:family="paragraph" style:parent-style-name="Text_20_body">
      <style:paragraph-properties fo:margin-left="0.1874in" fo:margin-right="0.1874in" fo:margin-top="0.0835in" fo:margin-bottom="0.0835in" style:contextual-spacing="false" fo:text-indent="0in" style:auto-text-indent="false"/>
    </style:style>
    <style:style style:name="P20" style:family="paragraph" style:parent-style-name="Text_20_body" style:list-style-name="L7">
      <style:paragraph-properties fo:margin-left="0.1043in" fo:margin-right="0.1043in" fo:margin-top="0.1043in" fo:margin-bottom="0.1043in" style:contextual-spacing="false" fo:text-indent="0in" style:auto-text-indent="false"/>
    </style:style>
    <style:style style:name="P21" style:family="paragraph" style:parent-style-name="Text_20_body">
      <style:paragraph-properties fo:margin-left="0.0835in" fo:margin-right="0.0835in" fo:margin-top="0.0728in" fo:margin-bottom="0in" style:contextual-spacing="false" fo:text-indent="0in" style:auto-text-indent="false"/>
    </style:style>
    <style:style style:name="T1" style:family="text">
      <style:text-properties fo:color="#ffffff" loext:opacity="100%" fo:font-weight="bold" loext:padding="0in" loext:border="none"/>
    </style:style>
    <style:style style:name="T2" style:family="text">
      <style:text-properties loext:padding-left="0.0835in" loext:padding-right="0in" loext:padding-top="0.0209in" loext:padding-bottom="0.0209in" loext:border-left="0.06pt solid #000000" loext:border-right="none" loext:border-top="0.06pt solid #000000" loext:border-bottom="0.06pt solid #000000"/>
    </style:style>
    <style:style style:name="T3" style:family="text"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4" style:family="text">
      <style:text-properties loext:padding-left="0in" loext:padding-right="0in" loext:padding-top="0in" loext:padding-bottom="0.0835in" loext:border-left="none" loext:border-right="none" loext:border-top="none" loext:border-bottom="0.06pt dashe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TL Quickstart: First Custom Modelfile</text:p>
      <text:p text:style-name="Text_20_body"><text:span text:style-name="Strong_20_Emphasis">Scan-friendly setup guide</text:span> | Goal: get your first custom model running in under 20 minutes</text:p>
      <text:p text:style-name="Text_20_body">What You Will Finish</text:p>
      <text:list text:style-name="L1">
        <text:list-item>
          <text:p text:style-name="P2">Create a new Modelfile with your own bot name + system prompt. </text:p>
        </text:list-item>
        <text:list-item>
          <text:p text:style-name="P2">Build a local custom model in Ollama from a base model. </text:p>
        </text:list-item>
        <text:list-item>
          <text:p text:style-name="P2">Set that model as operational in the CITL app. </text:p>
        </text:list-item>
        <text:list-item>
          <text:p text:style-name="P3">Run one verification question to confirm it works. </text:p>
        </text:list-item>
      </text:list>
      <text:p text:style-name="P4"><text:span text:style-name="Strong_20_Emphasis">Success looks like:</text:span> your model appears in <text:span text:style-name="Source_20_Text">Ollama: List</text:span> and answers in the Factbook tab without errors. </text:p>
      <text:p text:style-name="P4">Ultra-Short Checklist (Do This First)</text:p>
      <text:p text:style-name="P4">Ollama is installed and running. CITL app opens to the 4-tab interface. You can open the <text:span text:style-name="Strong_20_Emphasis">Library / Models</text:span> tab. You know which base model to use (recommended: <text:span text:style-name="Source_20_Text">olmo2:13b</text:span> if available). </text:p>
      <text:p text:style-name="P4">Step-by-Step (Main Path)</text:p>
      <text:p text:style-name="P5"><text:span text:style-name="T1">1</text:span> Start Ollama and launch CITL <text:span text:style-name="T2">2 min</text:span> </text:p>
      <text:h text:style-name="P6" text:outline-level="3">Do</text:h>
      <text:list text:style-name="L2">
        <text:list-item>
          <text:p text:style-name="P7">Start Ollama service. </text:p>
        </text:list-item>
        <text:list-item>
          <text:p text:style-name="P8"><text:span text:style-name="T3">Launch CITL via your normal launcher (for example </text:span><text:span text:style-name="Source_20_Text"><text:span text:style-name="T3">RUN_FACTBOOK.sh</text:span></text:span><text:span text:style-name="T3"> on Ubuntu). </text:span></text:p>
        </text:list-item>
      </text:list>
      <text:h text:style-name="P6" text:outline-level="3">Expect</text:h>
      <text:list text:style-name="L3">
        <text:list-item>
          <text:p text:style-name="P9">App opens with tabs: Factbook, Audio / Transcribe, Translate, Library / Models. </text:p>
        </text:list-item>
        <text:list-item>
          <text:p text:style-name="P9">No immediate \"ollama not found\" error. </text:p>
        </text:list-item>
      </text:list>
      <text:p text:style-name="P5">Quick check command: </text:p>
      <text:p text:style-name="P10">ollama list</text:p>
      <text:p text:style-name="P5"><text:span text:style-name="T1">2</text:span> Open Library / Models and choose base model <text:span text:style-name="T2">2 min</text:span> </text:p>
      <text:list text:style-name="L4">
        <text:list-item>
          <text:p text:style-name="P11"><text:span text:style-name="T3">Go to </text:span><text:span text:style-name="Strong_20_Emphasis"><text:span text:style-name="T3">Library / Models</text:span></text:span><text:span text:style-name="T3"> tab. </text:span></text:p>
        </text:list-item>
        <text:list-item>
          <text:p text:style-name="P11"><text:span text:style-name="T3">Click </text:span><text:span text:style-name="Strong_20_Emphasis"><text:span text:style-name="T3">Refresh Models</text:span></text:span><text:span text:style-name="T3"> (on Factbook tab if needed). </text:span></text:p>
        </text:list-item>
        <text:list-item>
          <text:p text:style-name="P11"><text:span text:style-name="T3">In </text:span><text:span text:style-name="Strong_20_Emphasis"><text:span text:style-name="T3">Base model (FROM)</text:span></text:span><text:span text:style-name="T3">, pick your base (example: </text:span><text:span text:style-name="Source_20_Text"><text:span text:style-name="T3">olmo2:13b</text:span></text:span><text:span text:style-name="T3">). </text:span></text:p>
        </text:list-item>
      </text:list>
      <text:p text:style-name="P12"><text:span text:style-name="T3">If base model is missing, click </text:span><text:span text:style-name="Strong_20_Emphasis"><text:span text:style-name="T3">Ollama: Pull FROM</text:span></text:span><text:span text:style-name="T3"> before continuing. </text:span></text:p>
      <text:p text:style-name="P5"><text:span text:style-name="T1">3</text:span> Fill the model form correctly <text:span text:style-name="T2">3 min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What to enter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ot name</text:span></text:p>
          </table:table-cell>
          <table:table-cell table:style-name="Table1.A1" office:value-type="string">
            <text:p text:style-name="Table_20_Contents">Display label for your assistant.</text:p>
          </table:table-cell>
          <table:table-cell table:style-name="Table1.A1" office:value-type="string">
            <text:p text:style-name="Table_20_Contents"><text:span text:style-name="Source_20_Text">CITL Policy Coach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ITL-COLOR</text:span></text:p>
          </table:table-cell>
          <table:table-cell table:style-name="Table1.A1" office:value-type="string">
            <text:p text:style-name="Table_20_Contents">Theme profile (optional, visual only).</text:p>
          </table:table-cell>
          <table:table-cell table:style-name="Table1.A1" office:value-type="string">
            <text:p text:style-name="Table_20_Contents"><text:span text:style-name="Source_20_Text">soft_midnight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ITL-LANG</text:span></text:p>
          </table:table-cell>
          <table:table-cell table:style-name="Table1.A1" office:value-type="string">
            <text:p text:style-name="Table_20_Contents">Default language code.</text:p>
          </table:table-cell>
          <table:table-cell table:style-name="Table1.A1" office:value-type="string">
            <text:p text:style-name="Table_20_Contents"><text:span text:style-name="Source_20_Text">e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ase model (FROM)</text:span></text:p>
          </table:table-cell>
          <table:table-cell table:style-name="Table1.A1" office:value-type="string">
            <text:p text:style-name="Table_20_Contents">The model your custom model inherits from.</text:p>
          </table:table-cell>
          <table:table-cell table:style-name="Table1.A1" office:value-type="string">
            <text:p text:style-name="Table_20_Contents"><text:span text:style-name="Source_20_Text">olmo2:13b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w model name</text:span></text:p>
          </table:table-cell>
          <table:table-cell table:style-name="Table1.A1" office:value-type="string">
            <text:p text:style-name="Table_20_Contents">Unique local model name (no spaces recommended).</text:p>
          </table:table-cell>
          <table:table-cell table:style-name="Table1.A1" office:value-type="string">
            <text:p text:style-name="Table_20_Contents"><text:span text:style-name="Source_20_Text">citl-policycoach-v1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STEM prompt</text:span></text:p>
          </table:table-cell>
          <table:table-cell table:style-name="Table1.A1" office:value-type="string">
            <text:p text:style-name="Table_20_Contents">Behavior rules for your assistant.</text:p>
          </table:table-cell>
          <table:table-cell table:style-name="Table1.A1" office:value-type="string">
            <text:p text:style-name="Table_20_Contents">See template below</text:p>
          </table:table-cell>
        </table:table-row>
      </table:table>
      <text:p text:style-name="P13"><text:span text:style-name="T3">Keep model names lowercase with dashes, e.g. </text:span><text:span text:style-name="Source_20_Text"><text:span text:style-name="T3">citl-xyz-v1</text:span></text:span><text:span text:style-name="T3">. </text:span></text:p>
      <text:p text:style-name="P5"><text:span text:style-name="T1">4</text:span> Write Modelfile <text:span text:style-name="T2">1 min</text:span> </text:p>
      <text:list text:style-name="L5">
        <text:list-item>
          <text:p text:style-name="P14"><text:span text:style-name="T3">Click </text:span><text:span text:style-name="Strong_20_Emphasis"><text:span text:style-name="T3">Write Modelfile</text:span></text:span><text:span text:style-name="T3">. </text:span></text:p>
        </text:list-item>
        <text:list-item>
          <text:p text:style-name="P15">Watch the model log panel for confirmation. </text:p>
        </text:list-item>
      </text:list>
      <text:p text:style-name="P5">Expected log lines include: </text:p>
      <text:p text:style-name="P10">Wrote Modelfile: .../Modelfile.citl-policycoach-v1</text:p>
      <text:p text:style-name="P10">[SAVE] FROM=olmo2:13b <text:s/>MODEL=citl-policycoach-v1</text:p>
      <text:p text:style-name="P5"><text:span text:style-name="T1">5</text:span> Create the custom model in Ollama <text:span text:style-name="T2">4-8 min</text:span> </text:p>
      <text:list text:style-name="L6">
        <text:list-item>
          <text:p text:style-name="P16"><text:span text:style-name="T3">Click </text:span><text:span text:style-name="Strong_20_Emphasis"><text:span text:style-name="T3">Ollama: Create/Update</text:span></text:span><text:span text:style-name="T3">. </text:span></text:p>
        </text:list-item>
        <text:list-item>
          <text:p text:style-name="P17">Wait for completion in the same log pane. </text:p>
        </text:list-item>
      </text:list>
      <text:p text:style-name="P12"><text:span text:style-name="Strong_20_Emphasis"><text:span text:style-name="T3">Ollama execution flow</text:span></text:span><text:span text:style-name="T3"> </text:span></text:p>
      <text:p text:style-name="P18">1Build from your Modelfile and wait for completion.</text:p>
      <text:p text:style-name="P19"><text:span text:style-name="T4">2Confirm the model appears in </text:span><text:span text:style-name="Source_20_Text"><text:span text:style-name="T4">ollama list</text:span></text:span><text:span text:style-name="T4">.</text:span></text:p>
      <text:p text:style-name="P19"><text:span text:style-name="T4">3Verify details with </text:span><text:span text:style-name="Source_20_Text"><text:span text:style-name="T4">ollama show &lt;model&gt;:latest</text:span></text:span><text:span text:style-name="T4">.</text:span></text:p>
      <text:p text:style-name="P10">ollama create citl-policycoach-v1 -f ~/CITL_Modelfiles/Modelfile.citl-policycoach-v1</text:p>
      <text:p text:style-name="P10">ollama list</text:p>
      <text:p text:style-name="P10">ollama show citl-policycoach-v1:latest</text:p>
      <text:p text:style-name="P12"><text:span text:style-name="Strong_20_Emphasis"><text:span text:style-name="T3">Expected log progression</text:span></text:span><text:span text:style-name="T3"> </text:span></text:p>
      <text:p text:style-name="P10">[CREATE] model=citl-policycoach-v1 <text:s/>modelfile=...</text:p>
      <text:p text:style-name="P10">[VERIFY] Graft saved and available: citl-policycoach-v1:latest</text:p>
      <text:p text:style-name="P12"><text:span text:style-name="Strong_20_Emphasis"><text:span text:style-name="T3">If it stalls</text:span></text:span><text:span text:style-name="T3"> Run </text:span><text:span text:style-name="Strong_20_Emphasis"><text:span text:style-name="T3">Ollama: List</text:span></text:span><text:span text:style-name="T3"> and confirm whether model appears. </text:span></text:p>
      <text:p text:style-name="P5"><text:span text:style-name="T1">6</text:span> Set as operational and test <text:span text:style-name="T2">2 min</text:span> </text:p>
      <text:list text:style-name="L7">
        <text:list-item>
          <text:p text:style-name="P20"><text:span text:style-name="T3">Click </text:span><text:span text:style-name="Strong_20_Emphasis"><text:span text:style-name="T3">Set As Operational</text:span></text:span><text:span text:style-name="T3"> (or select model in Operational model dropdown). </text:span></text:p>
        </text:list-item>
        <text:list-item>
          <text:p text:style-name="P20"><text:span text:style-name="T3">Go to </text:span><text:span text:style-name="Strong_20_Emphasis"><text:span text:style-name="T3">Factbook</text:span></text:span><text:span text:style-name="T3"> tab. </text:span></text:p>
        </text:list-item>
        <text:list-item>
          <text:p text:style-name="P20"><text:span text:style-name="T3">Ask a simple question and submit </text:span><text:span text:style-name="Strong_20_Emphasis"><text:span text:style-name="T3">Ask Factbook</text:span></text:span><text:span text:style-name="T3">. </text:span></text:p>
        </text:list-item>
      </text:list>
      <text:p text:style-name="P5">Success: response returns and no \"model not installed\" error appears. </text:p>
      <text:p text:style-name="Text_20_body">SYSTEM Prompt Starter (Copy/Edit)</text:p>
      <text:p text:style-name="Preformatted_20_Text">You are CITL Assistant, a professional academic support and fact-checking assistant.</text:p>
      <text:p text:style-name="Preformatted_20_Text"/>
      <text:p text:style-name="Preformatted_20_Text">Operational rules:</text:p>
      <text:p text:style-name="Preformatted_20_Text">1. Use only verified information from supplied local context.</text:p>
      <text:p text:style-name="Preformatted_20_Text">2. If context is weak or missing, say you do not have enough verified context.</text:p>
      <text:p text:style-name="Preformatted_20_Text">3. Do not invent facts, names, dates, or citations.</text:p>
      <text:p text:style-name="Preformatted_20_Text">4. Keep answers concise and structured.</text:p>
      <text:p text:style-name="Preformatted_20_Text">5. Include source identifiers when available.</text:p>
      <text:p text:style-name="P4">Quick Troubleshooting (Fast Fixes)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ymptom</text:p>
            </table:table-cell>
            <table:table-cell table:style-name="Table2.A1" office:value-type="string">
              <text:p text:style-name="Table_20_Heading">Likely Cause</text:p>
            </table:table-cell>
            <table:table-cell table:style-name="Table2.A1" office:value-type="string">
              <text:p text:style-name="Table_20_Heading">Fix</text:p>
            </table:table-cell>
          </table:table-row>
        </table:table-header-rows>
        <table:table-row>
          <table:table-cell table:style-name="Table2.A1" office:value-type="string">
            <text:p text:style-name="Table_20_Contents">\"ollama not found in PATH\"</text:p>
          </table:table-cell>
          <table:table-cell table:style-name="Table2.A1" office:value-type="string">
            <text:p text:style-name="Table_20_Contents">Ollama CLI not available in current shell/OS path.</text:p>
          </table:table-cell>
          <table:table-cell table:style-name="Table2.A1" office:value-type="string">
            <text:p text:style-name="Table_20_Contents">Install Ollama or reopen terminal/session so <text:span text:style-name="Source_20_Text">ollama</text:span> is in PATH.</text:p>
          </table:table-cell>
        </table:table-row>
        <table:table-row>
          <table:table-cell table:style-name="Table2.A1" office:value-type="string">
            <text:p text:style-name="Table_20_Contents">\"Base model is empty\"</text:p>
          </table:table-cell>
          <table:table-cell table:style-name="Table2.A1" office:value-type="string">
            <text:p text:style-name="Table_20_Contents">No FROM model selected.</text:p>
          </table:table-cell>
          <table:table-cell table:style-name="Table2.A1" office:value-type="string">
            <text:p text:style-name="Table_20_Contents">Select <text:span text:style-name="Strong_20_Emphasis">Base model (FROM)</text:span>, then run <text:span text:style-name="Strong_20_Emphasis">Ollama: Pull FROM</text:span>.</text:p>
          </table:table-cell>
        </table:table-row>
        <table:table-row>
          <table:table-cell table:style-name="Table2.A1" office:value-type="string">
            <text:p text:style-name="Table_20_Contents">Create works but model not selectable</text:p>
          </table:table-cell>
          <table:table-cell table:style-name="Table2.A1" office:value-type="string">
            <text:p text:style-name="Table_20_Contents">Model list not refreshed yet.</text:p>
          </table:table-cell>
          <table:table-cell table:style-name="Table2.A1" office:value-type="string">
            <text:p text:style-name="Table_20_Contents">Click <text:span text:style-name="Strong_20_Emphasis">Refresh Models</text:span> and then reselect model.</text:p>
          </table:table-cell>
        </table:table-row>
        <table:table-row>
          <table:table-cell table:style-name="Table2.A1" office:value-type="string">
            <text:p text:style-name="Table_20_Contents">Model builds but answers look generic</text:p>
          </table:table-cell>
          <table:table-cell table:style-name="Table2.A1" office:value-type="string">
            <text:p text:style-name="Table_20_Contents">SYSTEM prompt too weak or missing.</text:p>
          </table:table-cell>
          <table:table-cell table:style-name="Table2.A1" office:value-type="string">
            <text:p text:style-name="Table_20_Contents">Edit SYSTEM prompt, click <text:span text:style-name="Strong_20_Emphasis">Write Modelfile</text:span>, then <text:span text:style-name="Strong_20_Emphasis">Create/Update</text:span>.</text:p>
          </table:table-cell>
        </table:table-row>
        <table:table-row>
          <table:table-cell table:style-name="Table2.A1" office:value-type="string">
            <text:p text:style-name="Table_20_Contents">Wrong output source behavior</text:p>
          </table:table-cell>
          <table:table-cell table:style-name="Table2.A1" office:value-type="string">
            <text:p text:style-name="Table_20_Contents">Old model still operational.</text:p>
          </table:table-cell>
          <table:table-cell table:style-name="Table2.A1" office:value-type="string">
            <text:p text:style-name="Table_20_Contents">Set new model as operational and retry.</text:p>
          </table:table-cell>
        </table:table-row>
      </table:table>
      <text:p text:style-name="P21">If answers show cross-entity contamination or no citations in reliability modes, treat as release blocker and escalate. </text:p>
      <text:p text:style-name="Text_20_body">Terminal Fallback (If GUI Is Unavailable)</text:p>
      <text:p text:style-name="Preformatted_20_Text"># 1) Pull base model (if needed)</text:p>
      <text:p text:style-name="Preformatted_20_Text">ollama pull olmo2:13b</text:p>
      <text:p text:style-name="Preformatted_20_Text"/>
      <text:p text:style-name="Preformatted_20_Text"># 2) Create your Modelfile</text:p>
      <text:p text:style-name="Preformatted_20_Text">cat &gt; ~/CITL_Modelfiles/Modelfile.citl-policycoach-v1 &lt;&lt;'EOF'</text:p>
      <text:p text:style-name="Preformatted_20_Text">FROM olmo2:13b</text:p>
      <text:p text:style-name="Preformatted_20_Text">SYSTEM """</text:p>
      <text:p text:style-name="Preformatted_20_Text">You are CITL Policy Coach...</text:p>
      <text:p text:style-name="Preformatted_20_Text">"""</text:p>
      <text:p text:style-name="Preformatted_20_Text">EOF</text:p>
      <text:p text:style-name="Preformatted_20_Text"/>
      <text:p text:style-name="Preformatted_20_Text"># 3) Build custom model</text:p>
      <text:p text:style-name="Preformatted_20_Text">ollama create citl-policycoach-v1 -f ~/CITL_Modelfiles/Modelfile.citl-policycoach-v1</text:p>
      <text:p text:style-name="Preformatted_20_Text"/>
      <text:p text:style-name="Preformatted_20_Text"># 4) Verify</text:p>
      <text:p text:style-name="Preformatted_20_Text">ollama list</text:p>
      <text:p text:style-name="Preformatted_20_Text">ollama show citl-policycoach-v1:latest</text:p>
      <text:p text:style-name="P4">Final 60-Second Validation</text:p>
      <text:p text:style-name="Text_20_body">My model appears in <text:span text:style-name="Source_20_Text">ollama list</text:span>. I selected it as Operational model in CITL. Factbook tab answered one test question using this model. I saved the model name and base model in team notes. </text:p>
      <text:p text:style-name="Body_20_Text.footer">Document owner: CITL Engineering. Recommended usage: onboarding, lab setup, and handoff to instructional technologi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'Helvetica Neue', Arial, sans-serif"/>
    <style:font-face style:name="ui-monospace" svg:font-family="ui-monospace, SFMono-Regular, Menlo, Consolas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2%"/>
      <style:text-properties style:font-name="Segoe UI" fo:font-family="'Segoe UI', 'Helvetica Neue', Arial, sans-serif" style:font-name-asian="Segoe UI" style:font-family-asian="'Segoe UI', 'Helvetica Neue', Arial, sans-serif" style:font-name-complex="Segoe UI" style:font-family-complex="'Segoe UI', 'Helvetica Neue', 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Heading_20_1" style:display-name="Heading 1" style:family="paragraph" style:parent-style-name="Heading" style:next-style-name="Text_20_body" style:class="chapter">
      <style:text-properties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728in" fo:margin-right="0.0728in" fo:margin-top="0.0728in" fo:margin-bottom="0.0728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.1043in" fo:margin-right="0.1043in" fo:margin-top="0.1043in" fo:margin-bottom="0.0626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0835in" fo:margin-right="0.0835in" fo:margin-top="0.0835in" fo:margin-bottom="0.0835in" style:contextual-spacing="false" fo:line-height="145%" fo:padding-left="0.1043in" fo:padding-right="0in" fo:padding-top="0.1043in" fo:padding-bottom="0.1043in" fo:border-left="0.06pt solid #000000" fo:border-right="none" fo:border-top="0.06pt solid #000000" fo:border-bottom="0.06pt solid #000000"/>
      <style:text-properties style:font-name="ui-monospace" fo:font-family="ui-monospace, SFMono-Regular, Menlo, Consolas, monospace" fo:font-size="10pt" style:font-name-asian="ui-monospace" style:font-family-asian="ui-monospace, SFMono-Regular, Menlo, Consolas, monospace" style:font-size-asian="10pt" style:font-name-complex="ui-monospace" style:font-family-complex="ui-monospace, SFMono-Regular, Menlo, Consolas, monospace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Body_20_Text.footer" style:display-name="Body Text.footer" style:family="paragraph" style:parent-style-name="Text_20_body">
      <style:paragraph-properties fo:margin-top="0.1252in" fo:margin-bottom="0.0728in" style:contextual-spacing="fals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ui-monospace" fo:font-family="ui-monospace, SFMono-Regular, Menlo, Consolas, monospace" style:font-name-asian="ui-monospace" style:font-family-asian="ui-monospace, SFMono-Regular, Menlo, Consolas, monospace" style:font-name-complex="ui-monospace" style:font-family-complex="ui-monospace, SFMono-Regular, Menlo, Consolas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ITL First Custom Modelfile Quickstart</dc:title>
    <meta:document-statistic meta:table-count="2" meta:image-count="0" meta:object-count="0" meta:page-count="1" meta:paragraph-count="119" meta:word-count="733" meta:character-count="4754" meta:non-whitespace-character-count="4120"/>
    <meta:generator>LibreOffice/25.8.5.2$Linux_X86_64 LibreOffice_project/252c20f6956e3db0b52e6e2f9dda67263513c8fc</meta:generator>
    <meta:user-defined meta:name=""/>
    <meta:user-defined meta:name="viewport">width=device-width, initial-scale=1</meta:user-defined>
  </office:meta>
</office:document-meta>
</file>