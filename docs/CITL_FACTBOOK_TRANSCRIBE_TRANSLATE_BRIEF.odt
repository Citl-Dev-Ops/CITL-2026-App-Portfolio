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'Helvetica Neue', Arial, sans-serif"/>
    <style:font-face style:name="ui-monospace" svg:font-family="ui-monospace, SFMono-Regular, Menlo, Consolas, monospace"/>
  </office:font-face-decls>
  <office:automatic-styles>
    <style:style style:name="Table1" style:family="table">
      <style:table-properties style:width="6.8993in" fo:margin-left="0.0938in" table:align="left"/>
    </style:style>
    <style:style style:name="Table1.A" style:family="table-column">
      <style:table-column-properties style:column-width="3.1007in"/>
    </style:style>
    <style:style style:name="Table1.B" style:family="table-column">
      <style:table-column-properties style:column-width="1.8667in"/>
    </style:style>
    <style:style style:name="Table1.C" style:family="table-column">
      <style:table-column-properties style:column-width="1.931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8993in" fo:margin-left="0.0938in" table:align="left"/>
    </style:style>
    <style:style style:name="Table2.A" style:family="table-column">
      <style:table-column-properties style:column-width="1.0951in"/>
    </style:style>
    <style:style style:name="Table2.B" style:family="table-column">
      <style:table-column-properties style:column-width="1.7063in"/>
    </style:style>
    <style:style style:name="Table2.C" style:family="table-column">
      <style:table-column-properties style:column-width="2.4979in"/>
    </style:style>
    <style:style style:name="Table2.D" style:family="table-column">
      <style:table-column-properties style:column-width="1.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8993in" fo:margin-left="0.0938in" table:align="left"/>
    </style:style>
    <style:style style:name="Table3.A" style:family="table-column">
      <style:table-column-properties style:column-width="0.9611in"/>
    </style:style>
    <style:style style:name="Table3.B" style:family="table-column">
      <style:table-column-properties style:column-width="2.5778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.797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8993in" fo:margin-left="0.0938in" table:align="left"/>
    </style:style>
    <style:style style:name="Table4.A" style:family="table-column">
      <style:table-column-properties style:column-width="1.209in"/>
    </style:style>
    <style:style style:name="Table4.B" style:family="table-column">
      <style:table-column-properties style:column-width="2.6597in"/>
    </style:style>
    <style:style style:name="Table4.C" style:family="table-column">
      <style:table-column-properties style:column-width="1.8368in"/>
    </style:style>
    <style:style style:name="Table4.D" style:family="table-column">
      <style:table-column-properties style:column-width="1.193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8993in" fo:margin-left="0.0938in" table:align="left"/>
    </style:style>
    <style:style style:name="Table5.A" style:family="table-column">
      <style:table-column-properties style:column-width="1.184in"/>
    </style:style>
    <style:style style:name="Table5.B" style:family="table-column">
      <style:table-column-properties style:column-width="2.1542in"/>
    </style:style>
    <style:style style:name="Table5.C" style:family="table-column">
      <style:table-column-properties style:column-width="2.3014in"/>
    </style:style>
    <style:style style:name="Table5.D" style:family="table-column">
      <style:table-column-properties style:column-width="1.259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4674in" fo:margin-left="0.0938in" table:align="left"/>
    </style:style>
    <style:style style:name="Table6.A" style:family="table-column">
      <style:table-column-properties style:column-width="1.1674in"/>
    </style:style>
    <style:style style:name="Table6.B" style:family="table-column">
      <style:table-column-properties style:column-width="3.025in"/>
    </style:style>
    <style:style style:name="Table6.C" style:family="table-column">
      <style:table-column-properties style:column-width="2.0458in"/>
    </style:style>
    <style:style style:name="Table6.D" style:family="table-column">
      <style:table-column-properties style:column-width="1.2292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8993in" fo:margin-left="0.0938in" table:align="left"/>
    </style:style>
    <style:style style:name="Table7.A" style:family="table-column">
      <style:table-column-properties style:column-width="1.4951in"/>
    </style:style>
    <style:style style:name="Table7.B" style:family="table-column">
      <style:table-column-properties style:column-width="2.0382in"/>
    </style:style>
    <style:style style:name="Table7.C" style:family="table-column">
      <style:table-column-properties style:column-width="3.36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8993in" fo:margin-left="0.0938in" table:align="left"/>
    </style:style>
    <style:style style:name="Table8.A" style:family="table-column">
      <style:table-column-properties style:column-width="1.4611in"/>
    </style:style>
    <style:style style:name="Table8.B" style:family="table-column">
      <style:table-column-properties style:column-width="2.4924in"/>
    </style:style>
    <style:style style:name="Table8.C" style:family="table-column">
      <style:table-column-properties style:column-width="2.9458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>
      <style:paragraph-properties fo:margin-left="0in" fo:margin-right="0in" fo:margin-top="0.1457in" fo:margin-bottom="0.0835in" style:contextual-spacing="false" fo:text-indent="0in" style:auto-text-indent="false"/>
    </style:style>
    <style:style style:name="P3" style:family="paragraph" style:parent-style-name="Text_20_body" style:list-style-name="L1">
      <style:paragraph-properties fo:margin-top="0.1457in" fo:margin-bottom="0.0835in" style:contextual-spacing="false"/>
    </style:style>
    <style:style style:name="P4" style:family="paragraph" style:parent-style-name="Text_20_body">
      <style:paragraph-properties fo:margin-top="0.1457in" fo:margin-bottom="0.0835in" style:contextual-spacing="false"/>
    </style:style>
    <style:style style:name="P5" style:family="paragraph" style:parent-style-name="Text_20_body" style:list-style-name="L2">
      <style:paragraph-properties fo:margin-top="0.1457in" fo:margin-bottom="0.0835in" style:contextual-spacing="false"/>
    </style:style>
    <style:style style:name="P6" style:family="paragraph" style:parent-style-name="Heading_20_3">
      <style:paragraph-properties fo:margin-top="0.1457in" fo:margin-bottom="0.0835in" style:contextual-spacing="false"/>
    </style:style>
    <style:style style:name="P7" style:family="paragraph" style:parent-style-name="Text_20_body" style:list-style-name="L3">
      <style:paragraph-properties fo:margin-top="0.1457in" fo:margin-bottom="0.0835in" style:contextual-spacing="false"/>
    </style:style>
    <style:style style:name="P8" style:family="paragraph" style:parent-style-name="Text_20_body" style:list-style-name="L4">
      <style:paragraph-properties fo:margin-top="0.1457in" fo:margin-bottom="0.0835in" style:contextual-spacing="false"/>
    </style:style>
    <style:style style:name="P9" style:family="paragraph" style:parent-style-name="Preformatted_20_Text">
      <style:paragraph-properties fo:margin-top="0.1457in" fo:margin-bottom="0.0835in" style:contextual-spacing="false"/>
    </style:style>
    <style:style style:name="P10" style:family="paragraph" style:parent-style-name="Text_20_body" style:list-style-name="L5">
      <style:paragraph-properties fo:margin-top="0.1457in" fo:margin-bottom="0.0835in" style:contextual-spacing="false"/>
    </style:style>
    <style:style style:name="P11" style:family="paragraph" style:parent-style-name="Body_20_Text.small">
      <style:paragraph-properties fo:margin-top="0.1457in" fo:margin-bottom="0.0835in" style:contextual-spacing="false"/>
    </style:style>
    <style:style style:name="P12" style:family="paragraph" style:parent-style-name="Text_20_body">
      <style:paragraph-properties fo:margin-left="0.0937in" fo:margin-right="0.0937in" fo:margin-top="0.1457in" fo:margin-bottom="0.0835in" style:contextual-spacing="false" fo:text-indent="0in" style:auto-text-indent="false"/>
    </style:style>
    <style:style style:name="P13" style:family="paragraph" style:parent-style-name="Text_20_body" style:list-style-name="L6">
      <style:paragraph-properties fo:margin-top="0.1457in" fo:margin-bottom="0.0835in" style:contextual-spacing="false"/>
    </style:style>
    <style:style style:name="P14" style:family="paragraph" style:parent-style-name="Text_20_body" style:list-style-name="L7">
      <style:paragraph-properties fo:margin-top="0.1457in" fo:margin-bottom="0.0835in" style:contextual-spacing="false"/>
    </style:style>
    <style:style style:name="P15" style:family="paragraph" style:parent-style-name="Text_20_body" style:list-style-name="L8">
      <style:paragraph-properties fo:margin-top="0.1457in" fo:margin-bottom="0.0835in" style:contextual-spacing="false"/>
    </style:style>
    <style:style style:name="P16" style:family="paragraph" style:parent-style-name="Text_20_body">
      <style:paragraph-properties fo:margin-left="0.0937in" fo:margin-right="0.0937in" fo:margin-top="0.0937in" fo:margin-bottom="0.0937in" style:contextual-spacing="false" fo:text-indent="0in" style:auto-text-indent="false"/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P17" style:family="paragraph" style:parent-style-name="Text_20_body">
      <style:paragraph-properties fo:margin-left="0.0937in" fo:margin-right="0.0937in" fo:margin-top="0.0937in" fo:margin-bottom="0.0937in" style:contextual-spacing="false"/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P18" style:family="paragraph" style:parent-style-name="Text_20_body">
      <style:paragraph-properties fo:margin-left="0.0937in" fo:margin-right="0.0937in" fo:margin-top="0.0937in" fo:margin-bottom="0.0937in" style:contextual-spacing="false"/>
    </style:style>
    <style:style style:name="P19" style:family="paragraph" style:parent-style-name="Text_20_body" style:list-style-name="L9">
      <style:paragraph-properties fo:margin-top="0.1457in" fo:margin-bottom="0.0835in" style:contextual-spacing="false"/>
    </style:style>
    <style:style style:name="P20" style:family="paragraph" style:parent-style-name="Text_20_body" style:list-style-name="L10">
      <style:paragraph-properties fo:margin-top="0.1457in" fo:margin-bottom="0.0835in" style:contextual-spacing="false"/>
    </style:style>
    <style:style style:name="P21" style:family="paragraph" style:parent-style-name="Body_20_Text.footer">
      <style:paragraph-properties fo:margin-top="0.1457in" fo:margin-bottom="0.0835in" style:contextual-spacing="false"/>
    </style:style>
    <style:style style:name="T1" style:family="text"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TL Factbook + Transcribe + Translation</text:p>
      <text:p text:style-name="Text_20_body"><text:span text:style-name="Strong_20_Emphasis">Engineering Technical Manual</text:span> | Build snapshot: <text:span text:style-name="Strong_20_Emphasis">2026-03-11</text:span> | Audience: Engineering, IT Security, Academic Technology, Compliance Reviewers</text:p>
      <text:p text:style-name="P2">Manual Index</text:p>
      <text:list text:style-name="L1">
        <text:list-item>
          <text:p text:style-name="P3"><text:a xlink:type="simple" xlink:href="#scope" text:style-name="Internet_20_link" text:visited-style-name="Visited_20_Internet_20_Link">1. Scope and Operating Model</text:a> </text:p>
        </text:list-item>
        <text:list-item>
          <text:p text:style-name="P3"><text:a xlink:type="simple" xlink:href="#architecture" text:style-name="Internet_20_link" text:visited-style-name="Visited_20_Internet_20_Link">2. Architecture and Data Flows</text:a> </text:p>
        </text:list-item>
        <text:list-item>
          <text:p text:style-name="P3"><text:a xlink:type="simple" xlink:href="#files" text:style-name="Internet_20_link" text:visited-style-name="Visited_20_Internet_20_Link">3. Important Files and Responsibilities</text:a> </text:p>
        </text:list-item>
        <text:list-item>
          <text:p text:style-name="P3"><text:a xlink:type="simple" xlink:href="#buttons" text:style-name="Internet_20_link" text:visited-style-name="Visited_20_Internet_20_Link">4. GUI Control and Button Reference</text:a> </text:p>
        </text:list-item>
        <text:list-item>
          <text:p text:style-name="P3"><text:a xlink:type="simple" xlink:href="#provenance" text:style-name="Internet_20_link" text:visited-style-name="Visited_20_Internet_20_Link">5. LLM Provenance and Governance</text:a> </text:p>
        </text:list-item>
        <text:list-item>
          <text:p text:style-name="P3"><text:a xlink:type="simple" xlink:href="#privacy" text:style-name="Internet_20_link" text:visited-style-name="Visited_20_Internet_20_Link">6. Privacy, SaaS Risk, and Institutional Controls</text:a> </text:p>
        </text:list-item>
        <text:list-item>
          <text:p text:style-name="P3"><text:a xlink:type="simple" xlink:href="#runbook" text:style-name="Internet_20_link" text:visited-style-name="Visited_20_Internet_20_Link">7. Runbook and Verification Steps</text:a> </text:p>
        </text:list-item>
        <text:list-item>
          <text:p text:style-name="P3"><text:a xlink:type="simple" xlink:href="#qa" text:style-name="Internet_20_link" text:visited-style-name="Visited_20_Internet_20_Link">8. Engineer Q&amp;A (Tough Questions)</text:a> </text:p>
        </text:list-item>
        <text:list-item>
          <text:p text:style-name="P3"><text:a xlink:type="simple" xlink:href="#limits" text:style-name="Internet_20_link" text:visited-style-name="Visited_20_Internet_20_Link">9. Known Limits and Escalation Triggers</text:a> </text:p>
        </text:list-item>
      </text:list>
      <text:p text:style-name="P4"><text:span text:style-name="Strong_20_Emphasis">Positioning:</text:span> This system is designed to keep instructional data processing on institutional infrastructure by default. </text:p>
      <text:p text:style-name="P4"><text:span text:style-name="Strong_20_Emphasis">Legal note:</text:span> This manual is technical guidance and does not replace legal counsel review. </text:p>
      <text:p text:style-name="P4">1) Scope and Operating Model</text:p>
      <text:p text:style-name="P4">This application provides a local-first assistant for three primary workloads:</text:p>
      <text:list text:style-name="L2">
        <text:list-item>
          <text:p text:style-name="P5"><text:span text:style-name="Strong_20_Emphasis">Reference Q&amp;A:</text:span> deterministic and retrieval-augmented answers over local corpus data. </text:p>
        </text:list-item>
        <text:list-item>
          <text:p text:style-name="P5"><text:span text:style-name="Strong_20_Emphasis">Audio capture and transcription:</text:span> in-app microphone capture and local speech-to-text. </text:p>
        </text:list-item>
        <text:list-item>
          <text:p text:style-name="P5"><text:span text:style-name="Strong_20_Emphasis">Translation:</text:span> offline machine translation with optional study-pair generation. </text:p>
        </text:list-item>
      </text:list>
      <text:h text:style-name="P6" text:outline-level="3">Primary design goals</text:h>
      <text:list text:style-name="L3">
        <text:list-item>
          <text:p text:style-name="P7">Reduce cloud exposure of classroom artifacts. </text:p>
        </text:list-item>
        <text:list-item>
          <text:p text:style-name="P7">Keep outputs grounded in local corpus evidence where possible. </text:p>
        </text:list-item>
        <text:list-item>
          <text:p text:style-name="P7">Support reproducible model governance (Modelfile-based customization). </text:p>
        </text:list-item>
        <text:list-item>
          <text:p text:style-name="P7">Offer a practical operations surface for instructors and technical staff. </text:p>
        </text:list-item>
      </text:list>
      <text:h text:style-name="P6" text:outline-level="3">Non-goals</text:h>
      <text:list text:style-name="L4">
        <text:list-item>
          <text:p text:style-name="P8">No claim of full legal compliance automation. </text:p>
        </text:list-item>
        <text:list-item>
          <text:p text:style-name="P8">No guarantee of correctness without corpus coverage and quality checks. </text:p>
        </text:list-item>
        <text:list-item>
          <text:p text:style-name="P8">No replacement for institutional records-retention policy and access control policy. </text:p>
        </text:list-item>
      </text:list>
      <text:p text:style-name="P4">2) Architecture and Data Flows</text:p>
      <text:h text:style-name="P6" text:outline-level="3">High-level runtime flow</text:h>
      <text:p text:style-name="P9">GUI (Tkinter)</text:p>
      <text:p text:style-name="P9"><text:s text:c="2"/>-&gt; Factbook tab asks question</text:p>
      <text:p text:style-name="P9"><text:s text:c="4"/>-&gt; factbook_assistant_gui._query_factbook(...)</text:p>
      <text:p text:style-name="P9"><text:s text:c="6"/>-&gt; citl_factbook_query.answer_question(...)</text:p>
      <text:p text:style-name="P9"><text:s text:c="8"/>1) deterministic local truth path (entity-locked where available)</text:p>
      <text:p text:style-name="P9"><text:s text:c="8"/>2) embedding retrieval from local index</text:p>
      <text:p text:style-name="P9"><text:s text:c="8"/>3) local Ollama generation with grounding constraints</text:p>
      <text:p text:style-name="P9"><text:s text:c="8"/>4) safe fallback if generation unavailable</text:p>
      <text:p text:style-name="P9"/>
      <text:p text:style-name="P9">Audio tab</text:p>
      <text:p text:style-name="P9"><text:s text:c="2"/>-&gt; start_recording/stop_recording (sounddevice)</text:p>
      <text:p text:style-name="P9"><text:s text:c="2"/>-&gt; faster-whisper transcription (local CPU)</text:p>
      <text:p text:style-name="P9"/>
      <text:p text:style-name="P9">Translate tab</text:p>
      <text:p text:style-name="P9"><text:s text:c="2"/>-&gt; argostranslate translate(...)</text:p>
      <text:p text:style-name="P9"><text:s text:c="2"/>-&gt; optional language-pack install</text:p>
      <text:p text:style-name="P9"/>
      <text:p text:style-name="P9">Library/Models tab</text:p>
      <text:p text:style-name="P9"><text:s text:c="2"/>-&gt; corpus indexing scripts</text:p>
      <text:p text:style-name="P9"><text:s text:c="2"/>-&gt; Modelfile authoring</text:p>
      <text:p text:style-name="P9"><text:s text:c="2"/>-&gt; ollama pull/create/list lifecycle</text:p>
      <text:h text:style-name="P6" text:outline-level="3">Reference QA reliability layers</text:h>
      <text:list text:style-name="L5">
        <text:list-item>
          <text:p text:style-name="P10"><text:span text:style-name="Strong_20_Emphasis">Generic reference pipeline:</text:span> <text:span text:style-name="Source_20_Text">citl_factbook/reference_ingest.py</text:span>, <text:span text:style-name="Source_20_Text">reference_db.py</text:span>, <text:span text:style-name="Source_20_Text">reference_query.py</text:span>. </text:p>
        </text:list-item>
        <text:list-item>
          <text:p text:style-name="P10"><text:span text:style-name="Strong_20_Emphasis">Entity-locked answering:</text:span> entity detection + canonical-field routing + constrained lookup. </text:p>
        </text:list-item>
        <text:list-item>
          <text:p text:style-name="P10"><text:span text:style-name="Strong_20_Emphasis">Fallback strategy:</text:span> deterministic answer path preferred; safe refusal when reliability checks fail. </text:p>
        </text:list-item>
      </text:list>
      <text:p text:style-name="P4"><text:span text:style-name="Strong_20_Emphasis">Core reliability principle:</text:span> Do not emit unconstrained high-rank chunk text as final answer when grounding cannot be verified. </text:p>
      <text:p text:style-name="P4">3) Important Files and Responsibilities</text:p>
      <text:p text:style-name="P11">Paths are relative to repository root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le</text:p>
            </table:table-cell>
            <table:table-cell table:style-name="Table1.A1" office:value-type="string">
              <text:p text:style-name="Table_20_Heading">Primary Responsibility</text:p>
            </table:table-cell>
            <table:table-cell table:style-name="Table1.A1" office:value-type="string">
              <text:p text:style-name="Table_20_Heading">Operational 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factbook_assistant_gui.py</text:span></text:p>
          </table:table-cell>
          <table:table-cell table:style-name="Table1.A1" office:value-type="string">
            <text:p text:style-name="Table_20_Contents">Root launcher wrapper that delegates to package GUI.</text:p>
          </table:table-cell>
          <table:table-cell table:style-name="Table1.A1" office:value-type="string">
            <text:p text:style-name="Table_20_Contents">Ensures <text:span text:style-name="Source_20_Text">factbook-assistant/</text:span> is on <text:span text:style-name="Source_20_Text">sys.path</text:span>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factbook_assistant_gui.py</text:span></text:p>
          </table:table-cell>
          <table:table-cell table:style-name="Table1.A1" office:value-type="string">
            <text:p text:style-name="Table_20_Contents">Main desktop UI (tabs, buttons, model management, query dispatch).</text:p>
          </table:table-cell>
          <table:table-cell table:style-name="Table1.A1" office:value-type="string">
            <text:p text:style-name="Table_20_Contents">Central control-plane for most operator workflow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factbook_query.py</text:span></text:p>
          </table:table-cell>
          <table:table-cell table:style-name="Table1.A1" office:value-type="string">
            <text:p text:style-name="Table_20_Contents">Reference-answer orchestration, embedding retrieval, Ollama generation, fallback behavior.</text:p>
          </table:table-cell>
          <table:table-cell table:style-name="Table1.A1" office:value-type="string">
            <text:p text:style-name="Table_20_Contents">Contains strict grounding safeguards and model resolution logic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factbook/reference_ingest.py</text:span></text:p>
          </table:table-cell>
          <table:table-cell table:style-name="Table1.A1" office:value-type="string">
            <text:p text:style-name="Table_20_Contents">Generic corpus parser/ingester into entity + section structures.</text:p>
          </table:table-cell>
          <table:table-cell table:style-name="Table1.A1" office:value-type="string">
            <text:p text:style-name="Table_20_Contents">Supports configurable regex/header/canonical-field mapping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factbook/reference_db.py</text:span></text:p>
          </table:table-cell>
          <table:table-cell table:style-name="Table1.A1" office:value-type="string">
            <text:p text:style-name="Table_20_Contents">SQLite schema + FTS operations for corpora/entities/sections.</text:p>
          </table:table-cell>
          <table:table-cell table:style-name="Table1.A1" office:value-type="string">
            <text:p text:style-name="Table_20_Contents">Contains structured lookup and entity-scoped FTS fallback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factbook/reference_query.py</text:span></text:p>
          </table:table-cell>
          <table:table-cell table:style-name="Table1.A1" office:value-type="string">
            <text:p text:style-name="Table_20_Contents">Query planning (entity, intent, field), execution, rendering.</text:p>
          </table:table-cell>
          <table:table-cell table:style-name="Table1.A1" office:value-type="string">
            <text:p text:style-name="Table_20_Contents">Implements comparison mode and reliability outcome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factbook/reference_config.py</text:span></text:p>
          </table:table-cell>
          <table:table-cell table:style-name="Table1.A1" office:value-type="string">
            <text:p text:style-name="Table_20_Contents">Default parser/field config and optional JSON/YAML override load.</text:p>
          </table:table-cell>
          <table:table-cell table:style-name="Table1.A1" office:value-type="string">
            <text:p text:style-name="Table_20_Contents">Key extension point for non-Factbook reference corpora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factbook/cli.py</text:span></text:p>
          </table:table-cell>
          <table:table-cell table:style-name="Table1.A1" office:value-type="string">
            <text:p text:style-name="Table_20_Contents">CLI entrypoint for offline reference QA.</text:p>
          </table:table-cell>
          <table:table-cell table:style-name="Table1.A1" office:value-type="string">
            <text:p text:style-name="Table_20_Contents">Uses reference pipeline first, legacy retrieval fallback second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factbook/retrieve.py</text:span></text:p>
          </table:table-cell>
          <table:table-cell table:style-name="Table1.A1" office:value-type="string">
            <text:p text:style-name="Table_20_Contents">Legacy keyword scoring retriever over JSONL index.</text:p>
          </table:table-cell>
          <table:table-cell table:style-name="Table1.A1" office:value-type="string">
            <text:p text:style-name="Table_20_Contents">Basic fallback, not the preferred reliability path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factbook/ollama_client.py</text:span></text:p>
          </table:table-cell>
          <table:table-cell table:style-name="Table1.A1" office:value-type="string">
            <text:p text:style-name="Table_20_Contents">Simple Ollama generate client using env-configured model/host.</text:p>
          </table:table-cell>
          <table:table-cell table:style-name="Table1.A1" office:value-type="string">
            <text:p text:style-name="Table_20_Contents">Legacy/simple generation utility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build_corpus_index.py</text:span></text:p>
          </table:table-cell>
          <table:table-cell table:style-name="Table1.A1" office:value-type="string">
            <text:p text:style-name="Table_20_Contents">Builds local embedding index from file/dir sources.</text:p>
          </table:table-cell>
          <table:table-cell table:style-name="Table1.A1" office:value-type="string">
            <text:p text:style-name="Table_20_Contents">Auto-defaults <text:span text:style-name="Source_20_Text">--src</text:span>/<text:span text:style-name="Source_20_Text">--out</text:span> for GUI-triggered call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build_factbook_index.py</text:span></text:p>
          </table:table-cell>
          <table:table-cell table:style-name="Table1.A1" office:value-type="string">
            <text:p text:style-name="Table_20_Contents">Factbook-specific embedding index build path.</text:p>
          </table:table-cell>
          <table:table-cell table:style-name="Table1.A1" office:value-type="string">
            <text:p text:style-name="Table_20_Contents">Triggered from Library/Models tab butto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audio_ffmpeg_graceful_v2.py</text:span></text:p>
          </table:table-cell>
          <table:table-cell table:style-name="Table1.A1" office:value-type="string">
            <text:p text:style-name="Table_20_Contents">Audio device discovery, recording start/stop, diagnostics.</text:p>
          </table:table-cell>
          <table:table-cell table:style-name="Table1.A1" office:value-type="string">
            <text:p text:style-name="Table_20_Contents">Primary recording path uses <text:span text:style-name="Source_20_Text">sounddevice</text:span>; FFmpeg used for diagnostics/compatibility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translation.py</text:span></text:p>
          </table:table-cell>
          <table:table-cell table:style-name="Table1.A1" office:value-type="string">
            <text:p text:style-name="Table_20_Contents">Offline translation and language-pack install wrappers.</text:p>
          </table:table-cell>
          <table:table-cell table:style-name="Table1.A1" office:value-type="string">
            <text:p text:style-name="Table_20_Contents">Built on <text:span text:style-name="Source_20_Text">argostranslate</text:span>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transcribe_lecture.py</text:span></text:p>
          </table:table-cell>
          <table:table-cell table:style-name="Table1.A1" office:value-type="string">
            <text:p text:style-name="Table_20_Contents">Lecture CLI (record, transcribe, optional summarize).</text:p>
          </table:table-cell>
          <table:table-cell table:style-name="Table1.A1" office:value-type="string">
            <text:p text:style-name="Table_20_Contents">Useful for scripted/terminal workflow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class_capture.py</text:span></text:p>
          </table:table-cell>
          <table:table-cell table:style-name="Table1.A1" office:value-type="string">
            <text:p text:style-name="Table_20_Contents">Class capture UI with recording + whisper transcription + VTT export.</text:p>
          </table:table-cell>
          <table:table-cell table:style-name="Table1.A1" office:value-type="string">
            <text:p text:style-name="Table_20_Contents">Alternate capture experienc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modelfile.py</text:span></text:p>
          </table:table-cell>
          <table:table-cell table:style-name="Table1.A1" office:value-type="string">
            <text:p text:style-name="Table_20_Contents">Parses Modelfile metadata and extracts base/system fields.</text:p>
          </table:table-cell>
          <table:table-cell table:style-name="Table1.A1" office:value-type="string">
            <text:p text:style-name="Table_20_Contents">Backs GUI modelfile load/apply behavio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theme.py</text:span></text:p>
          </table:table-cell>
          <table:table-cell table:style-name="Table1.A1" office:value-type="string">
            <text:p text:style-name="Table_20_Contents">Theme palette definitions and apply helper.</text:p>
          </table:table-cell>
          <table:table-cell table:style-name="Table1.A1" office:value-type="string">
            <text:p text:style-name="Table_20_Contents">Includes accessible dark/light palette se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citl_app_sync.py</text:span></text:p>
          </table:table-cell>
          <table:table-cell table:style-name="Table1.A1" office:value-type="string">
            <text:p text:style-name="Table_20_Contents">Cross-platform repository sync utility for external/USB targets.</text:p>
          </table:table-cell>
          <table:table-cell table:style-name="Table1.A1" office:value-type="string">
            <text:p text:style-name="Table_20_Contents">Excludes large caches/models/audio by defaul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ata/citl/config_citl-mainframe-All-Series.json</text:span></text:p>
          </table:table-cell>
          <table:table-cell table:style-name="Table1.A1" office:value-type="string">
            <text:p text:style-name="Table_20_Contents">Local persisted operational profile (model, host, theme, modelfile path).</text:p>
          </table:table-cell>
          <table:table-cell table:style-name="Table1.A1" office:value-type="string">
            <text:p text:style-name="Table_20_Contents">Primary provenance and runtime default source on this hos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ata/citl/modelfiles/Modelfile.citl-custom4qw</text:span></text:p>
          </table:table-cell>
          <table:table-cell table:style-name="Table1.A1" office:value-type="string">
            <text:p text:style-name="Table_20_Contents">CITL model customization profile (FROM base + SYSTEM prompt).</text:p>
          </table:table-cell>
          <table:table-cell table:style-name="Table1.A1" office:value-type="string">
            <text:p text:style-name="Table_20_Contents">Documents local custom-model behavior and constraint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tests/test_factbook_reliable_qa.py</text:span></text:p>
          </table:table-cell>
          <table:table-cell table:style-name="Table1.A1" office:value-type="string">
            <text:p text:style-name="Table_20_Contents">Reliability tests for factbook workflow (goldens + negative controls).</text:p>
          </table:table-cell>
          <table:table-cell table:style-name="Table1.A1" office:value-type="string">
            <text:p text:style-name="Table_20_Contents">Includes Iran-vs-UAE contamination regression guard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actbook-assistant/tests/test_reference_pipeline_generic.py</text:span></text:p>
          </table:table-cell>
          <table:table-cell table:style-name="Table1.A1" office:value-type="string">
            <text:p text:style-name="Table_20_Contents">Generic non-Factbook reference-pipeline behavior tests.</text:p>
          </table:table-cell>
          <table:table-cell table:style-name="Table1.A1" office:value-type="string">
            <text:p text:style-name="Table_20_Contents">Validates entity-locking and unknown-field fail-safe behavior.</text:p>
          </table:table-cell>
        </table:table-row>
      </table:table>
      <text:p text:style-name="P12">4) GUI Control and Button Reference (Main Window)</text:p>
      <text:h text:style-name="P6" text:outline-level="3">Toolbar control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Control</text:p>
            </table:table-cell>
            <table:table-cell table:style-name="Table2.A1" office:value-type="string">
              <text:p text:style-name="Table_20_Heading">Handler</text:p>
            </table:table-cell>
            <table:table-cell table:style-name="Table2.A1" office:value-type="string">
              <text:p text:style-name="Table_20_Heading">Technical Action</text:p>
            </table:table-cell>
            <table:table-cell table:style-name="Table2.A1" office:value-type="string">
              <text:p text:style-name="Table_20_Heading">State Impact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Load Modelfile</text:span></text:p>
          </table:table-cell>
          <table:table-cell table:style-name="Table2.A1" office:value-type="string">
            <text:p text:style-name="Table_20_Contents"><text:span text:style-name="Source_20_Text">on_load_modelfile()</text:span></text:p>
          </table:table-cell>
          <table:table-cell table:style-name="Table2.A1" office:value-type="string">
            <text:p text:style-name="Table_20_Contents">Opens file picker, parses metadata/system/base, applies profile to UI, refreshes model lists, may trigger auto-graft check.</text:p>
          </table:table-cell>
          <table:table-cell table:style-name="Table2.A1" office:value-type="string">
            <text:p text:style-name="Table_20_Contents">Updates config keys: model/base/theme/bot/language/system prompt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USB Sync</text:span></text:p>
          </table:table-cell>
          <table:table-cell table:style-name="Table2.A1" office:value-type="string">
            <text:p text:style-name="Table_20_Contents"><text:span text:style-name="Source_20_Text">on_open_usb_sync()</text:span></text:p>
          </table:table-cell>
          <table:table-cell table:style-name="Table2.A1" office:value-type="string">
            <text:p text:style-name="Table_20_Contents">Launches app sync utility window for cross-repo synchronization.</text:p>
          </table:table-cell>
          <table:table-cell table:style-name="Table2.A1" office:value-type="string">
            <text:p text:style-name="Table_20_Contents">No model state change; may copy files to external target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heme dropdown</text:span></text:p>
          </table:table-cell>
          <table:table-cell table:style-name="Table2.A1" office:value-type="string">
            <text:p text:style-name="Table_20_Contents"><text:span text:style-name="Source_20_Text">on_theme_changed()</text:span></text:p>
          </table:table-cell>
          <table:table-cell table:style-name="Table2.A1" office:value-type="string">
            <text:p text:style-name="Table_20_Contents">Applies palette from <text:span text:style-name="Source_20_Text">citl_theme</text:span>.</text:p>
          </table:table-cell>
          <table:table-cell table:style-name="Table2.A1" office:value-type="string">
            <text:p text:style-name="Table_20_Contents">Writes <text:span text:style-name="Source_20_Text">theme</text:span> to config.</text:p>
          </table:table-cell>
        </table:table-row>
      </table:table>
      <text:h text:style-name="P6" text:outline-level="3">Factbook tab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Control</text:p>
            </table:table-cell>
            <table:table-cell table:style-name="Table3.A1" office:value-type="string">
              <text:p text:style-name="Table_20_Heading">Handler</text:p>
            </table:table-cell>
            <table:table-cell table:style-name="Table3.A1" office:value-type="string">
              <text:p text:style-name="Table_20_Heading">Technical Action</text:p>
            </table:table-cell>
            <table:table-cell table:style-name="Table3.A1" office:value-type="string">
              <text:p text:style-name="Table_20_Heading">Dependenci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Refresh Models</text:span></text:p>
          </table:table-cell>
          <table:table-cell table:style-name="Table3.A1" office:value-type="string">
            <text:p text:style-name="Table_20_Contents"><text:span text:style-name="Source_20_Text">on_refresh_models()</text:span></text:p>
          </table:table-cell>
          <table:table-cell table:style-name="Table3.A1" office:value-type="string">
            <text:p text:style-name="Table_20_Contents">Fetches <text:span text:style-name="Source_20_Text">/api/tags</text:span> from Ollama, merges JSON model list + saved models, de-duplicates, repopulates combos.</text:p>
          </table:table-cell>
          <table:table-cell table:style-name="Table3.A1" office:value-type="string">
            <text:p text:style-name="Table_20_Contents">Ollama reachable or JSON model list fallback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Load Model JSON</text:span></text:p>
          </table:table-cell>
          <table:table-cell table:style-name="Table3.A1" office:value-type="string">
            <text:p text:style-name="Table_20_Contents"><text:span text:style-name="Source_20_Text">on_load_model_json()</text:span></text:p>
          </table:table-cell>
          <table:table-cell table:style-name="Table3.A1" office:value-type="string">
            <text:p text:style-name="Table_20_Contents">Loads external JSON and extracts model names recursively from common keys.</text:p>
          </table:table-cell>
          <table:table-cell table:style-name="Table3.A1" office:value-type="string">
            <text:p text:style-name="Table_20_Contents">Readable JSON file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sk Factbook</text:span></text:p>
          </table:table-cell>
          <table:table-cell table:style-name="Table3.A1" office:value-type="string">
            <text:p text:style-name="Table_20_Contents"><text:span text:style-name="Source_20_Text">on_ask_factbook()</text:span></text:p>
          </table:table-cell>
          <table:table-cell table:style-name="Table3.A1" office:value-type="string">
            <text:p text:style-name="Table_20_Contents">Captures question/model/host; async call to <text:span text:style-name="Source_20_Text">_query_factbook()</text:span> and writes response to output pane.</text:p>
          </table:table-cell>
          <table:table-cell table:style-name="Table3.A1" office:value-type="string">
            <text:p text:style-name="Table_20_Contents"><text:span text:style-name="Source_20_Text">citl_factbook_query</text:span>, local index files, Ollama (optional depending on deterministic path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ranslate Answer</text:span></text:p>
          </table:table-cell>
          <table:table-cell table:style-name="Table3.A1" office:value-type="string">
            <text:p text:style-name="Table_20_Contents"><text:span text:style-name="Source_20_Text">on_send_factbook_to_translate()</text:span></text:p>
          </table:table-cell>
          <table:table-cell table:style-name="Table3.A1" office:value-type="string">
            <text:p text:style-name="Table_20_Contents">Copies Factbook output text into Translate tab source and switches tab.</text:p>
          </table:table-cell>
          <table:table-cell table:style-name="Table3.A1" office:value-type="string">
            <text:p text:style-name="Table_20_Contents">None.</text:p>
          </table:table-cell>
        </table:table-row>
      </table:table>
      <text:h text:style-name="P6" text:outline-level="3">Audio / Transcribe tab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Control</text:p>
            </table:table-cell>
            <table:table-cell table:style-name="Table4.A1" office:value-type="string">
              <text:p text:style-name="Table_20_Heading">Handler</text:p>
            </table:table-cell>
            <table:table-cell table:style-name="Table4.A1" office:value-type="string">
              <text:p text:style-name="Table_20_Heading">Technical Action</text:p>
            </table:table-cell>
            <table:table-cell table:style-name="Table4.A1" office:value-type="string">
              <text:p text:style-name="Table_20_Heading">Output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Refresh</text:span></text:p>
          </table:table-cell>
          <table:table-cell table:style-name="Table4.A1" office:value-type="string">
            <text:p text:style-name="Table_20_Contents"><text:span text:style-name="Source_20_Text">refresh_devices()</text:span></text:p>
          </table:table-cell>
          <table:table-cell table:style-name="Table4.A1" office:value-type="string">
            <text:p text:style-name="Table_20_Contents">Enumerates input devices; updates saved device selection.</text:p>
          </table:table-cell>
          <table:table-cell table:style-name="Table4.A1" office:value-type="string">
            <text:p text:style-name="Table_20_Contents">Device list + status message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eset Saved</text:span></text:p>
          </table:table-cell>
          <table:table-cell table:style-name="Table4.A1" office:value-type="string">
            <text:p text:style-name="Table_20_Contents"><text:span text:style-name="Source_20_Text">reset_saved_device()</text:span></text:p>
          </table:table-cell>
          <table:table-cell table:style-name="Table4.A1" office:value-type="string">
            <text:p text:style-name="Table_20_Contents">Clears persisted audio device from config and re-enumerates.</text:p>
          </table:table-cell>
          <table:table-cell table:style-name="Table4.A1" office:value-type="string">
            <text:p text:style-name="Table_20_Contents">Config update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iagnostics</text:span></text:p>
          </table:table-cell>
          <table:table-cell table:style-name="Table4.A1" office:value-type="string">
            <text:p text:style-name="Table_20_Contents"><text:span text:style-name="Source_20_Text">on_diagnostics()</text:span></text:p>
          </table:table-cell>
          <table:table-cell table:style-name="Table4.A1" office:value-type="string">
            <text:p text:style-name="Table_20_Contents">Prints audio diagnostics (including dshow note on Linux).</text:p>
          </table:table-cell>
          <table:table-cell table:style-name="Table4.A1" office:value-type="string">
            <text:p text:style-name="Table_20_Contents">Diagnostics text pane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tart Recording</text:span></text:p>
          </table:table-cell>
          <table:table-cell table:style-name="Table4.A1" office:value-type="string">
            <text:p text:style-name="Table_20_Contents"><text:span text:style-name="Source_20_Text">on_start()</text:span></text:p>
          </table:table-cell>
          <table:table-cell table:style-name="Table4.A1" office:value-type="string">
            <text:p text:style-name="Table_20_Contents">Calls <text:span text:style-name="Source_20_Text">start_recording()</text:span>, creates WAV in recordings directory, caches handle.</text:p>
          </table:table-cell>
          <table:table-cell table:style-name="Table4.A1" office:value-type="string">
            <text:p text:style-name="Table_20_Contents">Live recording stream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top Recording</text:span></text:p>
          </table:table-cell>
          <table:table-cell table:style-name="Table4.A1" office:value-type="string">
            <text:p text:style-name="Table_20_Contents"><text:span text:style-name="Source_20_Text">on_stop()</text:span></text:p>
          </table:table-cell>
          <table:table-cell table:style-name="Table4.A1" office:value-type="string">
            <text:p text:style-name="Table_20_Contents">Stops stream, validates WAV signal metrics, logs evidence line.</text:p>
          </table:table-cell>
          <table:table-cell table:style-name="Table4.A1" office:value-type="string">
            <text:p text:style-name="Table_20_Contents">Saved WAV and metrics log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Open Recordings Folder</text:span></text:p>
          </table:table-cell>
          <table:table-cell table:style-name="Table4.A1" office:value-type="string">
            <text:p text:style-name="Table_20_Contents"><text:span text:style-name="Source_20_Text">on_open_recordings_folder()</text:span></text:p>
          </table:table-cell>
          <table:table-cell table:style-name="Table4.A1" office:value-type="string">
            <text:p text:style-name="Table_20_Contents">Opens recordings directory via OS file manager.</text:p>
          </table:table-cell>
          <table:table-cell table:style-name="Table4.A1" office:value-type="string">
            <text:p text:style-name="Table_20_Contents">Folder view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Open Last WAV</text:span></text:p>
          </table:table-cell>
          <table:table-cell table:style-name="Table4.A1" office:value-type="string">
            <text:p text:style-name="Table_20_Contents"><text:span text:style-name="Source_20_Text">on_open_last_wav()</text:span></text:p>
          </table:table-cell>
          <table:table-cell table:style-name="Table4.A1" office:value-type="string">
            <text:p text:style-name="Table_20_Contents">Opens latest recorded WAV in system default app.</text:p>
          </table:table-cell>
          <table:table-cell table:style-name="Table4.A1" office:value-type="string">
            <text:p text:style-name="Table_20_Contents">File open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ranscribe Last WAV</text:span></text:p>
          </table:table-cell>
          <table:table-cell table:style-name="Table4.A1" office:value-type="string">
            <text:p text:style-name="Table_20_Contents"><text:span text:style-name="Source_20_Text">on_transcribe()</text:span></text:p>
          </table:table-cell>
          <table:table-cell table:style-name="Table4.A1" office:value-type="string">
            <text:p text:style-name="Table_20_Contents">Runs <text:span text:style-name="Source_20_Text">_transcribe_wav()</text:span> using faster-whisper; writes transcript text and sidecar TXT.</text:p>
          </table:table-cell>
          <table:table-cell table:style-name="Table4.A1" office:value-type="string">
            <text:p text:style-name="Table_20_Contents">Transcript in pane + <text:span text:style-name="Source_20_Text">.txt</text:span> file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ranslate Transcript</text:span></text:p>
          </table:table-cell>
          <table:table-cell table:style-name="Table4.A1" office:value-type="string">
            <text:p text:style-name="Table_20_Contents"><text:span text:style-name="Source_20_Text">on_send_transcript_to_translate()</text:span></text:p>
          </table:table-cell>
          <table:table-cell table:style-name="Table4.A1" office:value-type="string">
            <text:p text:style-name="Table_20_Contents">Copies transcript pane text into Translate tab source.</text:p>
          </table:table-cell>
          <table:table-cell table:style-name="Table4.A1" office:value-type="string">
            <text:p text:style-name="Table_20_Contents">Tab switch with text seed.</text:p>
          </table:table-cell>
        </table:table-row>
      </table:table>
      <text:h text:style-name="P6" text:outline-level="3">Translate tab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Control</text:p>
            </table:table-cell>
            <table:table-cell table:style-name="Table5.A1" office:value-type="string">
              <text:p text:style-name="Table_20_Heading">Handler</text:p>
            </table:table-cell>
            <table:table-cell table:style-name="Table5.A1" office:value-type="string">
              <text:p text:style-name="Table_20_Heading">Technical Action</text:p>
            </table:table-cell>
            <table:table-cell table:style-name="Table5.A1" office:value-type="string">
              <text:p text:style-name="Table_20_Heading">Note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⇄</text:span></text:p>
          </table:table-cell>
          <table:table-cell table:style-name="Table5.A1" office:value-type="string">
            <text:p text:style-name="Table_20_Contents"><text:span text:style-name="Source_20_Text">on_swap_languages()</text:span></text:p>
          </table:table-cell>
          <table:table-cell table:style-name="Table5.A1" office:value-type="string">
            <text:p text:style-name="Table_20_Contents">Swaps source and target languages in UI vars.</text:p>
          </table:table-cell>
          <table:table-cell table:style-name="Table5.A1" office:value-type="string">
            <text:p text:style-name="Table_20_Contents">No translation call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Translate</text:span></text:p>
          </table:table-cell>
          <table:table-cell table:style-name="Table5.A1" office:value-type="string">
            <text:p text:style-name="Table_20_Contents"><text:span text:style-name="Source_20_Text">on_translate()</text:span></text:p>
          </table:table-cell>
          <table:table-cell table:style-name="Table5.A1" office:value-type="string">
            <text:p text:style-name="Table_20_Contents">Runs offline translation via <text:span text:style-name="Source_20_Text">citl_translation.translate()</text:span> thread.</text:p>
          </table:table-cell>
          <table:table-cell table:style-name="Table5.A1" office:value-type="string">
            <text:p text:style-name="Table_20_Contents">Requires installed pair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Install Pack</text:span></text:p>
          </table:table-cell>
          <table:table-cell table:style-name="Table5.A1" office:value-type="string">
            <text:p text:style-name="Table_20_Contents"><text:span text:style-name="Source_20_Text">on_install_lang_pack()</text:span></text:p>
          </table:table-cell>
          <table:table-cell table:style-name="Table5.A1" office:value-type="string">
            <text:p text:style-name="Table_20_Contents">Calls Argos package index/update/install workflow.</text:p>
          </table:table-cell>
          <table:table-cell table:style-name="Table5.A1" office:value-type="string">
            <text:p text:style-name="Table_20_Contents">May require internet once for package download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lear</text:span></text:p>
          </table:table-cell>
          <table:table-cell table:style-name="Table5.A1" office:value-type="string">
            <text:p text:style-name="Table_20_Contents"><text:span text:style-name="Source_20_Text">on_clear_translate()</text:span></text:p>
          </table:table-cell>
          <table:table-cell table:style-name="Table5.A1" office:value-type="string">
            <text:p text:style-name="Table_20_Contents">Clears source/result/vocabulary panes.</text:p>
          </table:table-cell>
          <table:table-cell table:style-name="Table5.A1" office:value-type="string">
            <text:p text:style-name="Table_20_Contents">UI reset only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Live translation checkbox</text:span></text:p>
          </table:table-cell>
          <table:table-cell table:style-name="Table5.A1" office:value-type="string">
            <text:p text:style-name="Table_20_Contents"><text:span text:style-name="Source_20_Text">_on_tr_source_keyrelease()</text:span></text:p>
          </table:table-cell>
          <table:table-cell table:style-name="Table5.A1" office:value-type="string">
            <text:p text:style-name="Table_20_Contents">Debounced translate call every 800ms while typing.</text:p>
          </table:table-cell>
          <table:table-cell table:style-name="Table5.A1" office:value-type="string">
            <text:p text:style-name="Table_20_Contents">Optional real-time translation mode.</text:p>
          </table:table-cell>
        </table:table-row>
      </table:table>
      <text:h text:style-name="P6" text:outline-level="3">Library / Models tab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Control</text:p>
            </table:table-cell>
            <table:table-cell table:style-name="Table6.A1" office:value-type="string">
              <text:p text:style-name="Table_20_Heading">Handler</text:p>
            </table:table-cell>
            <table:table-cell table:style-name="Table6.A1" office:value-type="string">
              <text:p text:style-name="Table_20_Heading">Technical Action</text:p>
            </table:table-cell>
            <table:table-cell table:style-name="Table6.A1" office:value-type="string">
              <text:p text:style-name="Table_20_Heading">Execution Detail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Add Books (txt/docx/pdf)</text:span></text:p>
          </table:table-cell>
          <table:table-cell table:style-name="Table6.A1" office:value-type="string">
            <text:p text:style-name="Table_20_Contents"><text:span text:style-name="Source_20_Text">on_add_books()</text:span></text:p>
          </table:table-cell>
          <table:table-cell table:style-name="Table6.A1" office:value-type="string">
            <text:p text:style-name="Table_20_Contents">Copies selected files into <text:span text:style-name="Source_20_Text">factbook-assistant/library/</text:span>.</text:p>
          </table:table-cell>
          <table:table-cell table:style-name="Table6.A1" office:value-type="string">
            <text:p text:style-name="Table_20_Contents">Does not auto-index; run rebuild next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Rebuild Factbook Index</text:span></text:p>
          </table:table-cell>
          <table:table-cell table:style-name="Table6.A1" office:value-type="string">
            <text:p text:style-name="Table_20_Contents"><text:span text:style-name="Source_20_Text">on_rebuild_factbook_index()</text:span></text:p>
          </table:table-cell>
          <table:table-cell table:style-name="Table6.A1" office:value-type="string">
            <text:p text:style-name="Table_20_Contents">Launches <text:span text:style-name="Source_20_Text">python build_factbook_index.py</text:span> in background log runner.</text:p>
          </table:table-cell>
          <table:table-cell table:style-name="Table6.A1" office:value-type="string">
            <text:p text:style-name="Table_20_Contents">Writes embeddings/chunks artifacts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Rebuild Corpus Index</text:span></text:p>
          </table:table-cell>
          <table:table-cell table:style-name="Table6.A1" office:value-type="string">
            <text:p text:style-name="Table_20_Contents"><text:span text:style-name="Source_20_Text">on_rebuild_corpus_index()</text:span></text:p>
          </table:table-cell>
          <table:table-cell table:style-name="Table6.A1" office:value-type="string">
            <text:p text:style-name="Table_20_Contents">Launches <text:span text:style-name="Source_20_Text">python build_corpus_index.py</text:span>.</text:p>
          </table:table-cell>
          <table:table-cell table:style-name="Table6.A1" office:value-type="string">
            <text:p text:style-name="Table_20_Contents">Generic corpus path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Verify Index Health</text:span></text:p>
          </table:table-cell>
          <table:table-cell table:style-name="Table6.A1" office:value-type="string">
            <text:p text:style-name="Table_20_Contents"><text:span text:style-name="Source_20_Text">on_verify_index()</text:span></text:p>
          </table:table-cell>
          <table:table-cell table:style-name="Table6.A1" office:value-type="string">
            <text:p text:style-name="Table_20_Contents">Loads common embedding JSON files and reports detected matrix shape.</text:p>
          </table:table-cell>
          <table:table-cell table:style-name="Table6.A1" office:value-type="string">
            <text:p text:style-name="Table_20_Contents">Best-effort health check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USB App Sync</text:span></text:p>
          </table:table-cell>
          <table:table-cell table:style-name="Table6.A1" office:value-type="string">
            <text:p text:style-name="Table_20_Contents"><text:span text:style-name="Source_20_Text">on_open_usb_sync()</text:span></text:p>
          </table:table-cell>
          <table:table-cell table:style-name="Table6.A1" office:value-type="string">
            <text:p text:style-name="Table_20_Contents">Opens CITL app sync utility from this tab context.</text:p>
          </table:table-cell>
          <table:table-cell table:style-name="Table6.A1" office:value-type="string">
            <text:p text:style-name="Table_20_Contents">Optional control availability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Set As Operational</text:span></text:p>
          </table:table-cell>
          <table:table-cell table:style-name="Table6.A1" office:value-type="string">
            <text:p text:style-name="Table_20_Contents"><text:span text:style-name="Source_20_Text">on_set_operational_from_new_name()</text:span></text:p>
          </table:table-cell>
          <table:table-cell table:style-name="Table6.A1" office:value-type="string">
            <text:p text:style-name="Table_20_Contents">Promotes new model name to active operational model.</text:p>
          </table:table-cell>
          <table:table-cell table:style-name="Table6.A1" office:value-type="string">
            <text:p text:style-name="Table_20_Contents">Persists to config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Browse</text:span></text:p>
          </table:table-cell>
          <table:table-cell table:style-name="Table6.A1" office:value-type="string">
            <text:p text:style-name="Table_20_Contents"><text:span text:style-name="Source_20_Text">on_browse_modelfile()</text:span></text:p>
          </table:table-cell>
          <table:table-cell table:style-name="Table6.A1" office:value-type="string">
            <text:p text:style-name="Table_20_Contents">Selects modelfile path.</text:p>
          </table:table-cell>
          <table:table-cell table:style-name="Table6.A1" office:value-type="string">
            <text:p text:style-name="Table_20_Contents">No write until save/create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Open Folder</text:span></text:p>
          </table:table-cell>
          <table:table-cell table:style-name="Table6.A1" office:value-type="string">
            <text:p text:style-name="Table_20_Contents"><text:span text:style-name="Source_20_Text">on_open_modelfiles_dir()</text:span></text:p>
          </table:table-cell>
          <table:table-cell table:style-name="Table6.A1" office:value-type="string">
            <text:p text:style-name="Table_20_Contents">Opens Modelfile directory in file manager.</text:p>
          </table:table-cell>
          <table:table-cell table:style-name="Table6.A1" office:value-type="string">
            <text:p text:style-name="Table_20_Contents">Path from config/env fallback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Write Modelfile</text:span></text:p>
          </table:table-cell>
          <table:table-cell table:style-name="Table6.A1" office:value-type="string">
            <text:p text:style-name="Table_20_Contents"><text:span text:style-name="Source_20_Text">on_write_modelfile()</text:span></text:p>
          </table:table-cell>
          <table:table-cell table:style-name="Table6.A1" office:value-type="string">
            <text:p text:style-name="Table_20_Contents">Generates Modelfile with metadata + FROM + SYSTEM prompt.</text:p>
          </table:table-cell>
          <table:table-cell table:style-name="Table6.A1" office:value-type="string">
            <text:p text:style-name="Table_20_Contents">Updates config and model selections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Ollama: List</text:span></text:p>
          </table:table-cell>
          <table:table-cell table:style-name="Table6.A1" office:value-type="string">
            <text:p text:style-name="Table_20_Contents"><text:span text:style-name="Source_20_Text">on_ollama_list()</text:span></text:p>
          </table:table-cell>
          <table:table-cell table:style-name="Table6.A1" office:value-type="string">
            <text:p text:style-name="Table_20_Contents">Runs <text:span text:style-name="Source_20_Text">ollama list</text:span> and streams output to log pane.</text:p>
          </table:table-cell>
          <table:table-cell table:style-name="Table6.A1" office:value-type="string">
            <text:p text:style-name="Table_20_Contents">Requires <text:span text:style-name="Source_20_Text">ollama</text:span> in PATH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Ollama: Pull FROM</text:span></text:p>
          </table:table-cell>
          <table:table-cell table:style-name="Table6.A1" office:value-type="string">
            <text:p text:style-name="Table_20_Contents"><text:span text:style-name="Source_20_Text">on_ollama_pull_from()</text:span></text:p>
          </table:table-cell>
          <table:table-cell table:style-name="Table6.A1" office:value-type="string">
            <text:p text:style-name="Table_20_Contents">Runs <text:span text:style-name="Source_20_Text">ollama pull &lt;base_model&gt;</text:span>.</text:p>
          </table:table-cell>
          <table:table-cell table:style-name="Table6.A1" office:value-type="string">
            <text:p text:style-name="Table_20_Contents">Downloads base model artifact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Ollama: Create/Update</text:span></text:p>
          </table:table-cell>
          <table:table-cell table:style-name="Table6.A1" office:value-type="string">
            <text:p text:style-name="Table_20_Contents"><text:span text:style-name="Source_20_Text">on_ollama_create()</text:span></text:p>
          </table:table-cell>
          <table:table-cell table:style-name="Table6.A1" office:value-type="string">
            <text:p text:style-name="Table_20_Contents">Ensures Modelfile exists, then runs <text:span text:style-name="Source_20_Text">ollama create &lt;name&gt; -f &lt;modelfile&gt;</text:span>.</text:p>
          </table:table-cell>
          <table:table-cell table:style-name="Table6.A1" office:value-type="string">
            <text:p text:style-name="Table_20_Contents">Verifies model appears in <text:span text:style-name="Source_20_Text">ollama list</text:span>.</text:p>
          </table:table-cell>
        </table:table-row>
      </table:table>
      <text:p text:style-name="P12"><text:span text:style-name="Strong_20_Emphasis">Coverage note:</text:span> This section documents controls in the main application window and its four primary tabs. </text:p>
      <text:p text:style-name="P4">5) LLM Provenance and Governance</text:p>
      <text:h text:style-name="P6" text:outline-level="3">Current local model provenance snapshot (2026-03-11)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Item</text:p>
            </table:table-cell>
            <table:table-cell table:style-name="Table7.A1" office:value-type="string">
              <text:p text:style-name="Table_20_Heading">Observed Value</text:p>
            </table:table-cell>
            <table:table-cell table:style-name="Table7.A1" office:value-type="string">
              <text:p text:style-name="Table_20_Heading">Evidence Path / Command</text:p>
            </table:table-cell>
          </table:table-row>
        </table:table-header-rows>
        <table:table-row>
          <table:table-cell table:style-name="Table7.A1" office:value-type="string">
            <text:p text:style-name="Table_20_Contents">Configured operational model</text:p>
          </table:table-cell>
          <table:table-cell table:style-name="Table7.A1" office:value-type="string">
            <text:p text:style-name="Table_20_Contents"><text:span text:style-name="Source_20_Text">citl-custom4qw</text:span></text:p>
          </table:table-cell>
          <table:table-cell table:style-name="Table7.A1" office:value-type="string">
            <text:p text:style-name="Table_20_Contents"><text:span text:style-name="Source_20_Text">data/citl/config_citl-mainframe-All-Series.json</text:span></text:p>
          </table:table-cell>
        </table:table-row>
        <table:table-row>
          <table:table-cell table:style-name="Table7.A1" office:value-type="string">
            <text:p text:style-name="Table_20_Contents">Resolved runtime model</text:p>
          </table:table-cell>
          <table:table-cell table:style-name="Table7.A1" office:value-type="string">
            <text:p text:style-name="Table_20_Contents"><text:span text:style-name="Source_20_Text">citl-custom4qw:latest</text:span></text:p>
          </table:table-cell>
          <table:table-cell table:style-name="Table7.A1" office:value-type="string">
            <text:p text:style-name="Table_20_Contents"><text:span text:style-name="Source_20_Text">ollama list</text:span></text:p>
          </table:table-cell>
        </table:table-row>
        <table:table-row>
          <table:table-cell table:style-name="Table7.A1" office:value-type="string">
            <text:p text:style-name="Table_20_Contents">Base model for custom model</text:p>
          </table:table-cell>
          <table:table-cell table:style-name="Table7.A1" office:value-type="string">
            <text:p text:style-name="Table_20_Contents"><text:span text:style-name="Source_20_Text">olmo2:13b</text:span></text:p>
          </table:table-cell>
          <table:table-cell table:style-name="Table7.A1" office:value-type="string">
            <text:p text:style-name="Table_20_Contents"><text:span text:style-name="Source_20_Text">data/citl/modelfiles/Modelfile.citl-custom4qw</text:span> (FROM line)</text:p>
          </table:table-cell>
        </table:table-row>
        <table:table-row>
          <table:table-cell table:style-name="Table7.A1" office:value-type="string">
            <text:p text:style-name="Table_20_Contents">Base model architecture</text:p>
          </table:table-cell>
          <table:table-cell table:style-name="Table7.A1" office:value-type="string">
            <text:p text:style-name="Table_20_Contents"><text:span text:style-name="Source_20_Text">olmo2</text:span>, 13.7B params, Q4_K_M</text:p>
          </table:table-cell>
          <table:table-cell table:style-name="Table7.A1" office:value-type="string">
            <text:p text:style-name="Table_20_Contents"><text:span text:style-name="Source_20_Text">ollama show olmo2:13b</text:span></text:p>
          </table:table-cell>
        </table:table-row>
        <table:table-row>
          <table:table-cell table:style-name="Table7.A1" office:value-type="string">
            <text:p text:style-name="Table_20_Contents">Base model system provenance text</text:p>
          </table:table-cell>
          <table:table-cell table:style-name="Table7.A1" office:value-type="string">
            <text:p text:style-name="Table_20_Contents">"...built by the Allen Institute for AI"</text:p>
          </table:table-cell>
          <table:table-cell table:style-name="Table7.A1" office:value-type="string">
            <text:p text:style-name="Table_20_Contents"><text:span text:style-name="Source_20_Text">ollama show olmo2:13b</text:span></text:p>
          </table:table-cell>
        </table:table-row>
        <table:table-row>
          <table:table-cell table:style-name="Table7.A1" office:value-type="string">
            <text:p text:style-name="Table_20_Contents">Custom model system prompt</text:p>
          </table:table-cell>
          <table:table-cell table:style-name="Table7.A1" office:value-type="string">
            <text:p text:style-name="Table_20_Contents">CITL academic support + fact-checking rules</text:p>
          </table:table-cell>
          <table:table-cell table:style-name="Table7.A1" office:value-type="string">
            <text:p text:style-name="Table_20_Contents"><text:span text:style-name="Source_20_Text">ollama show --modelfile citl-custom4qw:latest</text:span></text:p>
          </table:table-cell>
        </table:table-row>
        <table:table-row>
          <table:table-cell table:style-name="Table7.A1" office:value-type="string">
            <text:p text:style-name="Table_20_Contents">Embedding model</text:p>
          </table:table-cell>
          <table:table-cell table:style-name="Table7.A1" office:value-type="string">
            <text:p text:style-name="Table_20_Contents"><text:span text:style-name="Source_20_Text">nomic-embed-text:latest</text:span></text:p>
          </table:table-cell>
          <table:table-cell table:style-name="Table7.A1" office:value-type="string">
            <text:p text:style-name="Table_20_Contents"><text:span text:style-name="Source_20_Text">ollama list</text:span> + retrieval defaults</text:p>
          </table:table-cell>
        </table:table-row>
      </table:table>
      <text:h text:style-name="P6" text:outline-level="3">Governance procedure for model changes</text:h>
      <text:list text:style-name="L6">
        <text:list-item>
          <text:p text:style-name="P13">Update or write Modelfile via GUI (<text:span text:style-name="Strong_20_Emphasis">Write Modelfile</text:span>). </text:p>
        </text:list-item>
        <text:list-item>
          <text:p text:style-name="P13">Create model artifact via <text:span text:style-name="Strong_20_Emphasis">Ollama: Create/Update</text:span>. </text:p>
        </text:list-item>
        <text:list-item>
          <text:p text:style-name="P13">Record model hash and metadata from <text:span text:style-name="Source_20_Text">ollama list</text:span> and <text:span text:style-name="Source_20_Text">ollama show</text:span>. </text:p>
        </text:list-item>
        <text:list-item>
          <text:p text:style-name="P13">Persist operational model selection in config profile. </text:p>
        </text:list-item>
        <text:list-item>
          <text:p text:style-name="P13">Run reliability smoke tests before classroom deployment. </text:p>
        </text:list-item>
      </text:list>
      <text:p text:style-name="P4"><text:span text:style-name="Strong_20_Emphasis">Why AllenAI model bases here:</text:span> transparent lineage, local deployment support, open licensing posture (Apache 2.0 in observed local model metadata), and fit for education/NGO governance requirements. </text:p>
      <text:p text:style-name="P4">6) Privacy, SaaS Risk, and Institutional Controls</text:p>
      <text:h text:style-name="P6" text:outline-level="3">How this architecture addresses SaaS privacy concerns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Risk Area</text:p>
            </table:table-cell>
            <table:table-cell table:style-name="Table8.A1" office:value-type="string">
              <text:p text:style-name="Table_20_Heading">Typical SaaS LLM Risk</text:p>
            </table:table-cell>
            <table:table-cell table:style-name="Table8.A1" office:value-type="string">
              <text:p text:style-name="Table_20_Heading">CITL Local Mitigation</text:p>
            </table:table-cell>
          </table:table-row>
        </table:table-header-rows>
        <table:table-row>
          <table:table-cell table:style-name="Table8.A1" office:value-type="string">
            <text:p text:style-name="Table_20_Contents">Student text/audio exposure</text:p>
          </table:table-cell>
          <table:table-cell table:style-name="Table8.A1" office:value-type="string">
            <text:p text:style-name="Table_20_Contents">Data sent to external vendor endpoints.</text:p>
          </table:table-cell>
          <table:table-cell table:style-name="Table8.A1" office:value-type="string">
            <text:p text:style-name="Table_20_Contents">Inference/transcription/translation run locally by default; no mandatory cloud API in primary workflow.</text:p>
          </table:table-cell>
        </table:table-row>
        <table:table-row>
          <table:table-cell table:style-name="Table8.A1" office:value-type="string">
            <text:p text:style-name="Table_20_Contents">Vendor model training reuse</text:p>
          </table:table-cell>
          <table:table-cell table:style-name="Table8.A1" office:value-type="string">
            <text:p text:style-name="Table_20_Contents">Potential use of prompts/logs for provider model improvement (policy-dependent).</text:p>
          </table:table-cell>
          <table:table-cell table:style-name="Table8.A1" office:value-type="string">
            <text:p text:style-name="Table_20_Contents">Local-hosted models avoid automatic third-party training pipelines.</text:p>
          </table:table-cell>
        </table:table-row>
        <table:table-row>
          <table:table-cell table:style-name="Table8.A1" office:value-type="string">
            <text:p text:style-name="Table_20_Contents">Data brokerage / repurposing</text:p>
          </table:table-cell>
          <table:table-cell table:style-name="Table8.A1" office:value-type="string">
            <text:p text:style-name="Table_20_Contents">Unclear downstream sharing controls across vendor ecosystem.</text:p>
          </table:table-cell>
          <table:table-cell table:style-name="Table8.A1" office:value-type="string">
            <text:p text:style-name="Table_20_Contents">Institution controls storage and transport boundaries; no inherent broker feed in local stack.</text:p>
          </table:table-cell>
        </table:table-row>
        <table:table-row>
          <table:table-cell table:style-name="Table8.A1" office:value-type="string">
            <text:p text:style-name="Table_20_Contents">Cross-border data transfer</text:p>
          </table:table-cell>
          <table:table-cell table:style-name="Table8.A1" office:value-type="string">
            <text:p text:style-name="Table_20_Contents">Opaque data residency and subprocessors.</text:p>
          </table:table-cell>
          <table:table-cell table:style-name="Table8.A1" office:value-type="string">
            <text:p text:style-name="Table_20_Contents">Local deployment supports institution-controlled residency strategy.</text:p>
          </table:table-cell>
        </table:table-row>
        <table:table-row>
          <table:table-cell table:style-name="Table8.A1" office:value-type="string">
            <text:p text:style-name="Table_20_Contents">Auditing and evidence</text:p>
          </table:table-cell>
          <table:table-cell table:style-name="Table8.A1" office:value-type="string">
            <text:p text:style-name="Table_20_Contents">Limited vendor transparency into model lineage and runtime details.</text:p>
          </table:table-cell>
          <table:table-cell table:style-name="Table8.A1" office:value-type="string">
            <text:p text:style-name="Table_20_Contents">Modelfile + local config + local model metadata are inspectable and reproducible.</text:p>
          </table:table-cell>
        </table:table-row>
      </table:table>
      <text:h text:style-name="P6" text:outline-level="3">Institutional privacy ordinance alignment (technical posture)</text:h>
      <text:list text:style-name="L7">
        <text:list-item>
          <text:p text:style-name="P14">Supports data minimization by keeping instructional processing local when configured accordingly. </text:p>
        </text:list-item>
        <text:list-item>
          <text:p text:style-name="P14">Supports least-privilege operations through local account and filesystem controls. </text:p>
        </text:list-item>
        <text:list-item>
          <text:p text:style-name="P14">Supports auditability through config files, model manifests, and local logs. </text:p>
        </text:list-item>
        <text:list-item>
          <text:p text:style-name="P14">Supports policy-driven retention by controlling local transcript/index storage directories. </text:p>
        </text:list-item>
      </text:list>
      <text:p text:style-name="P4"><text:span text:style-name="Strong_20_Emphasis">Compliance boundary:</text:span> this software can support compliance objectives (for example FERPA-style student record controls), but institutional policy, legal review, IAM controls, and endpoint security are still required. </text:p>
      <text:h text:style-name="P6" text:outline-level="3">Data handling boundaries to enforce operationally</text:h>
      <text:list text:style-name="L8">
        <text:list-item>
          <text:p text:style-name="P15">Do not enable outbound LLM APIs in classroom profiles unless approved by policy. </text:p>
        </text:list-item>
        <text:list-item>
          <text:p text:style-name="P15">Pin Ollama host to institution-managed local endpoint. </text:p>
        </text:list-item>
        <text:list-item>
          <text:p text:style-name="P15">Limit corpus ingestion paths to approved instructional materials. </text:p>
        </text:list-item>
        <text:list-item>
          <text:p text:style-name="P15">Apply retention schedules to <text:span text:style-name="Source_20_Text">data/citl/recordings</text:span> and transcript outputs. </text:p>
        </text:list-item>
        <text:list-item>
          <text:p text:style-name="P15">Restrict access to config and index artifacts to authorized staff. </text:p>
        </text:list-item>
      </text:list>
      <text:p text:style-name="P4">7) Engineer Runbook and Verification Steps</text:p>
      <text:h text:style-name="P6" text:outline-level="3">Startup validation checklist</text:h>
      <text:p text:style-name="P9">1. Start Ollama service</text:p>
      <text:p text:style-name="P9">2. Verify models:</text:p>
      <text:p text:style-name="P9"><text:s text:c="3"/>ollama list</text:p>
      <text:p text:style-name="P9">3. Verify active profile:</text:p>
      <text:p text:style-name="P9"><text:s text:c="3"/>cat data/citl/config_citl-mainframe-All-Series.json</text:p>
      <text:p text:style-name="P9">4. Open app and confirm model/host in Factbook tab</text:p>
      <text:p text:style-name="P9">5. Run smoke query and verify citations + country/entity lock behavior</text:p>
      <text:p text:style-name="P9">6. Run transcript test (30-60 sec audio)</text:p>
      <text:p text:style-name="P9">7. Run translation test with installed language pair</text:p>
      <text:p text:style-name="P4"><text:span text:style-name="Strong_20_Emphasis">Ollama verification chain</text:span> Execute this sequence without skipping steps when validating a new profile rollout. </text:p>
      <text:p text:style-name="P9">ollama list</text:p>
      <text:p text:style-name="P9">ollama show olmo2:13b</text:p>
      <text:p text:style-name="P9">ollama show citl-custom4qw:latest</text:p>
      <text:p text:style-name="P9">ollama show --modelfile citl-custom4qw:latest</text:p>
      <text:h text:style-name="P6" text:outline-level="3">Model provenance verification commands</text:h>
      <text:p text:style-name="P9">ollama list</text:p>
      <text:p text:style-name="P9">ollama show olmo2:13b</text:p>
      <text:p text:style-name="P9">ollama show citl-custom4qw:latest</text:p>
      <text:p text:style-name="P9">ollama show --modelfile citl-custom4qw:latest</text:p>
      <text:h text:style-name="P6" text:outline-level="3">Regression checks before deployment</text:h>
      <text:p text:style-name="P9">python -m unittest factbook-assistant/tests/test_factbook_reliable_qa.py</text:p>
      <text:p text:style-name="P9">python -m unittest factbook-assistant/tests/test_reference_pipeline_generic.py</text:p>
      <text:p text:style-name="P4"><text:span text:style-name="Strong_20_Emphasis">Release gate:</text:span> if entity-locking regressions are observed (for example wrong country/entity response), block classroom release until fixed and re-tested. </text:p>
      <text:p text:style-name="P4">8) Engineer Q&amp;A (Tough Questions Playbook)</text:p>
      <text:p text:style-name="P16">Q1. Is this just another chatbot wrapper?</text:p>
      <text:p text:style-name="P17">No. It is a composite local system: deterministic reference query logic, local retrieval/indexing, local model lifecycle management, local transcription, and offline translation. The chatbot surface is only one component.</text:p>
      <text:p text:style-name="P16">Q2. How do we prove model provenance?</text:p>
      <text:p text:style-name="P18"><text:span text:style-name="T1">Use local evidence chain: config profile (</text:span><text:span text:style-name="Source_20_Text"><text:span text:style-name="T1">ollama_model</text:span></text:span><text:span text:style-name="T1">), Modelfile FROM line, </text:span><text:span text:style-name="Source_20_Text"><text:span text:style-name="T1">ollama list</text:span></text:span><text:span text:style-name="T1"> model IDs, and </text:span><text:span text:style-name="Source_20_Text"><text:span text:style-name="T1">ollama show</text:span></text:span><text:span text:style-name="T1"> metadata. This establishes model identity, lineage, and local runtime artifact.</text:span></text:p>
      <text:p text:style-name="P16">Q3. Why AllenAI/OLMo family instead of closed SaaS models?</text:p>
      <text:p text:style-name="P17">Primary reasons are governance and controllability: inspectable model lineage, local hosting, reproducible deployment, and reduced third-party exposure of classroom artifacts.</text:p>
      <text:p text:style-name="P16">Q4. Does the app send student data to the cloud?</text:p>
      <text:p text:style-name="P17">In default local deployment, primary inference and processing paths are local. Administrators must still verify network policy, host configuration, and package-install phases (for example one-time language pack downloads).</text:p>
      <text:p text:style-name="P16">Q5. Can vendor-side training on our prompts happen here?</text:p>
      <text:p text:style-name="P17">For local-only model execution, there is no default external provider training loop. If external APIs are introduced later, this assumption changes and requires policy review.</text:p>
      <text:p text:style-name="P16">Q6. How does this reduce data brokerage risk?</text:p>
      <text:p text:style-name="P17">By avoiding default transmission of classroom data to ad-tech or multi-tenant SaaS ecosystems, institutional data remains in governed local infrastructure unless explicitly exported.</text:p>
      <text:p text:style-name="P16">Q7. What institutional privacy frameworks does this support?</text:p>
      <text:p text:style-name="P17">It supports technical controls commonly needed for student-data governance (local processing, access control, auditability, retention controls). Formal legal compliance status must be determined by institutional counsel and policy teams.</text:p>
      <text:p text:style-name="P16">Q8. What problem does entity-locked retrieval solve?</text:p>
      <text:p text:style-name="P17">It prevents cross-entity contamination (for example returning UAE data for an Iran question). This is critical for trust in reference-book QA workflows.</text:p>
      <text:p text:style-name="P16">Q9. What happens when model generation endpoint is unavailable?</text:p>
      <text:p text:style-name="P17">The system can return deterministic/local reliability-safe results or explicit inability-to-answer messages instead of hallucinated content.</text:p>
      <text:p text:style-name="P16">Q10. Why keep the legacy retriever modules if a better pipeline exists?</text:p>
      <text:p text:style-name="P17">Legacy modules preserve backward compatibility and can act as degraded fallback paths while migration to the generic reference pipeline continues.</text:p>
      <text:p text:style-name="P16">Q11. Is transcription fully offline?</text:p>
      <text:p text:style-name="P17">Speech recognition is local in current workflows. One-time dependency/model installation may require internet during setup phases.</text:p>
      <text:p text:style-name="P16">Q12. Is translation fully offline?</text:p>
      <text:p text:style-name="P17">After language packs are installed, translation runs offline via Argos. Initial package retrieval is network-dependent.</text:p>
      <text:p text:style-name="P16">Q13. What is the strongest evidence this is not locked to one book?</text:p>
      <text:p text:style-name="P18"><text:span text:style-name="T1">The </text:span><text:span text:style-name="Source_20_Text"><text:span text:style-name="T1">reference_ingest/reference_query/reference_config</text:span></text:span><text:span text:style-name="T1"> modules are corpus-agnostic and tested with non-Factbook sample corpora in </text:span><text:span text:style-name="Source_20_Text"><text:span text:style-name="T1">test_reference_pipeline_generic.py</text:span></text:span><text:span text:style-name="T1">.</text:span></text:p>
      <text:p text:style-name="P16">Q14. How do we answer claims that local models are less accurate than SaaS?</text:p>
      <text:p text:style-name="P17">Accuracy is workload-specific. This system mitigates risk by deterministic extraction, citation requirements, entity-locking, and regression tests. For high-stakes use, domain eval sets and acceptance thresholds should drive deployment decisions.</text:p>
      <text:p text:style-name="P16">Q15. What if instructors accidentally ingest sensitive files?</text:p>
      <text:p text:style-name="P17">Implement ingestion policy controls: approved directories, access controls, and review workflows. The tool allows local governance; it does not enforce institution policy by itself.</text:p>
      <text:p text:style-name="P16">Q16. What if a dean asks "why this app exists"?</text:p>
      <text:p text:style-name="P17">It solves the gap between AI utility and institutional privacy obligations: local-first instructional assistance, auditable model governance, and practical teacher-facing workflows for Q&amp;A, transcription, and translation.</text:p>
      <text:p text:style-name="P16">Q17. What are the primary measurable outcomes?</text:p>
      <text:p text:style-name="P17">Reduced external data transfer for classroom artifacts, faster instructor retrieval workflows, improved transcript availability, and repeatable provenance tracking for deployed models.</text:p>
      <text:p text:style-name="P16">Q18. Can this meet all privacy requirements automatically?</text:p>
      <text:p text:style-name="P17">No. It provides a strong technical substrate, but compliance requires policy, IAM, endpoint controls, network controls, retention policy, and legal governance.</text:p>
      <text:p text:style-name="P16">Q19. How do we defend against "black box" criticism?</text:p>
      <text:p text:style-name="P17">By providing inspectable Modelfiles, local model metadata, explicit retrieval pipelines, citation outputs, deterministic fallback logic, and regression tests tied to known failure modes.</text:p>
      <text:p text:style-name="P16">Q20. What should trigger immediate engineering escalation?</text:p>
      <text:p text:style-name="P17">Cross-entity answer contamination, missing-citation high-confidence answers, model identity drift, unexpected outbound traffic, or failures in reliability test suite.</text:p>
      <text:p text:style-name="P4">9) Known Limits and Escalation Triggers</text:p>
      <text:h text:style-name="P6" text:outline-level="3">Known technical limits</text:h>
      <text:list text:style-name="L9">
        <text:list-item>
          <text:p text:style-name="P19">Legacy retriever path remains keyword-based and should not be treated as high-assurance by itself. </text:p>
        </text:list-item>
        <text:list-item>
          <text:p text:style-name="P19">Corpus quality and parser heuristics directly affect deterministic extraction quality. </text:p>
        </text:list-item>
        <text:list-item>
          <text:p text:style-name="P19">Audio quality, device gain, and environment noise strongly affect transcription outcomes. </text:p>
        </text:list-item>
      </text:list>
      <text:h text:style-name="P6" text:outline-level="3">Escalate immediately when observed</text:h>
      <text:list text:style-name="L10">
        <text:list-item>
          <text:p text:style-name="P20">Any wrong-entity answers in known deterministic question classes. </text:p>
        </text:list-item>
        <text:list-item>
          <text:p text:style-name="P20">Loss of model provenance evidence (unknown model ID/lineage in deployment). </text:p>
        </text:list-item>
        <text:list-item>
          <text:p text:style-name="P20">Operational profile drift across lab/classroom endpoints. </text:p>
        </text:list-item>
        <text:list-item>
          <text:p text:style-name="P20">Any policy exception requiring non-local API routing for student artifacts. </text:p>
        </text:list-item>
      </text:list>
      <text:p text:style-name="P21">Document owner: CITL Engineering. Review cadence: each model or architecture change, or at least once per academic term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'Helvetica Neue', Arial, sans-serif"/>
    <style:font-face style:name="ui-monospace" svg:font-family="ui-monospace, SFMono-Regular, Menlo, Consolas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2%"/>
      <style:text-properties style:font-name="Segoe UI" fo:font-family="'Segoe UI', 'Helvetica Neue', Arial, sans-serif" style:font-name-asian="Segoe UI" style:font-family-asian="'Segoe UI', 'Helvetica Neue', Arial, sans-serif" style:font-name-complex="Segoe UI" style:font-family-complex="'Segoe UI', 'Helvetica Neue', 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Heading_20_1" style:display-name="Heading 1" style:family="paragraph" style:parent-style-name="Heading" style:next-style-name="Text_20_body" style:class="chapter">
      <style:text-properties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left="0.0835in" fo:margin-right="0.0835in" fo:margin-top="0.0835in" fo:margin-bottom="0.083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left="0.1252in" fo:margin-right="0.1252in" fo:margin-top="0.1252in" fo:margin-bottom="0.0626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1043in" fo:margin-right="0.1043in" fo:margin-top="0.1043in" fo:margin-bottom="0.1043in" style:contextual-spacing="false" fo:line-height="145%" fo:padding-left="0.1043in" fo:padding-right="0in" fo:padding-top="0.1043in" fo:padding-bottom="0.1043in" fo:border-left="0.06pt solid #000000" fo:border-right="none" fo:border-top="0.06pt solid #000000" fo:border-bottom="0.06pt solid #000000"/>
      <style:text-properties style:font-name="ui-monospace" fo:font-family="ui-monospace, SFMono-Regular, Menlo, Consolas, monospace" fo:font-size="10pt" style:font-name-asian="ui-monospace" style:font-family-asian="ui-monospace, SFMono-Regular, Menlo, Consolas, monospace" style:font-size-asian="10pt" style:font-name-complex="ui-monospace" style:font-family-complex="ui-monospace, SFMono-Regular, Menlo, Consolas, monospace" style:font-size-complex="10pt"/>
    </style:style>
    <style:style style:name="Body_20_Text.small" style:display-name="Body Text.small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Body_20_Text.footer" style:display-name="Body Text.footer" style:family="paragraph" style:parent-style-name="Text_20_body">
      <style:paragraph-properties fo:margin-top="0.1457in" fo:margin-bottom="0.0835in" style:contextual-spacing="fals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ui-monospace" fo:font-family="ui-monospace, SFMono-Regular, Menlo, Consolas, monospace" style:font-name-asian="ui-monospace" style:font-family-asian="ui-monospace, SFMono-Regular, Menlo, Consolas, monospace" style:font-name-complex="ui-monospace" style:font-family-complex="ui-monospace, SFMono-Regular, Menlo, Consolas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ITL Engineering Manual</dc:title>
    <meta:document-statistic meta:table-count="8" meta:image-count="0" meta:object-count="0" meta:page-count="1" meta:paragraph-count="428" meta:word-count="2554" meta:character-count="20770" meta:non-whitespace-character-count="18576"/>
    <meta:generator>LibreOffice/25.8.5.2$Linux_X86_64 LibreOffice_project/252c20f6956e3db0b52e6e2f9dda67263513c8fc</meta:generator>
    <meta:user-defined meta:name=""/>
    <meta:user-defined meta:name="viewport">width=device-width, initial-scale=1</meta:user-defined>
  </office:meta>
</office:document-meta>
</file>